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6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_k_repulsion_1.700000_k_attraction2_1.220000" table:style-name="ta1">
        <table:shapes>
          <draw:frame draw:z-index="0" draw:style-name="gr1" draw:text-style-name="P1" svg:width="15.999cm" svg:height="8.999cm" svg:x="7.886cm" svg:y="0.525cm">
            <draw:object draw:notify-on-update-of-ranges="'Result_k_repulsion_1.700000_k_attraction2_1.220000'.A1:'Result_k_repulsion_1.700000_k_attraction2_1.220000'.A1 'Result_k_repulsion_1.700000_k_attraction2_1.220000'.A2:'Result_k_repulsion_1.700000_k_attraction2_1.220000'.A52 'Result_k_repulsion_1.700000_k_attraction2_1.220000'.B1:'Result_k_repulsion_1.700000_k_attraction2_1.220000'.B1 'Result_k_repulsion_1.700000_k_attraction2_1.220000'.B2:'Result_k_repulsion_1.700000_k_attraction2_1.220000'.B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draw:transform="rotate (0.000174532925199433) translate (24.139cm 0.339cm)">
            <draw:object draw:notify-on-update-of-ranges="'Result_k_repulsion_1.700000_k_attraction2_1.220000'.A1:'Result_k_repulsion_1.700000_k_attraction2_1.220000'.A1 'Result_k_repulsion_1.700000_k_attraction2_1.220000'.A2:'Result_k_repulsion_1.700000_k_attraction2_1.220000'.A52 'Result_k_repulsion_1.700000_k_attraction2_1.220000'.C1:'Result_k_repulsion_1.700000_k_attraction2_1.220000'.C1 'Result_k_repulsion_1.700000_k_attraction2_1.220000'.C2:'Result_k_repulsion_1.700000_k_attraction2_1.220000'.C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_attractivité1</text:p>
          </table:table-cell>
          <table:table-cell office:value-type="string" calcext:value-type="string">
            <text:p>RMSD_dist</text:p>
          </table:table-cell>
          <table:table-cell office:value-type="string" calcext:value-type="string">
            <text:p>RMSD_angle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291861" calcext:value-type="float">
            <text:p>0,291861</text:p>
          </table:table-cell>
          <table:table-cell office:value-type="float" office:value="64.351341" calcext:value-type="float">
            <text:p>64,351341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0.293145" calcext:value-type="float">
            <text:p>0,293145</text:p>
          </table:table-cell>
          <table:table-cell office:value-type="float" office:value="64.341266" calcext:value-type="float">
            <text:p>64,341266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0.292363" calcext:value-type="float">
            <text:p>0,292363</text:p>
          </table:table-cell>
          <table:table-cell office:value-type="float" office:value="64.341325" calcext:value-type="float">
            <text:p>64,341325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0.291898" calcext:value-type="float">
            <text:p>0,291898</text:p>
          </table:table-cell>
          <table:table-cell office:value-type="float" office:value="64.355844" calcext:value-type="float">
            <text:p>64,355844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0.294973" calcext:value-type="float">
            <text:p>0,294973</text:p>
          </table:table-cell>
          <table:table-cell office:value-type="float" office:value="63.86703" calcext:value-type="float">
            <text:p>63,86703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276773" calcext:value-type="float">
            <text:p>0,276773</text:p>
          </table:table-cell>
          <table:table-cell office:value-type="float" office:value="48.698538" calcext:value-type="float">
            <text:p>48,698538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0.266505" calcext:value-type="float">
            <text:p>0,266505</text:p>
          </table:table-cell>
          <table:table-cell office:value-type="float" office:value="44.974002" calcext:value-type="float">
            <text:p>44,974002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0.254631" calcext:value-type="float">
            <text:p>0,254631</text:p>
          </table:table-cell>
          <table:table-cell office:value-type="float" office:value="41.083927" calcext:value-type="float">
            <text:p>41,083927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0.246676" calcext:value-type="float">
            <text:p>0,246676</text:p>
          </table:table-cell>
          <table:table-cell office:value-type="float" office:value="38.698162" calcext:value-type="float">
            <text:p>38,698162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0.23179" calcext:value-type="float">
            <text:p>0,23179</text:p>
          </table:table-cell>
          <table:table-cell office:value-type="float" office:value="36.295061" calcext:value-type="float">
            <text:p>36,295061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222519" calcext:value-type="float">
            <text:p>0,222519</text:p>
          </table:table-cell>
          <table:table-cell office:value-type="float" office:value="33.613413" calcext:value-type="float">
            <text:p>33,613413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0.219819" calcext:value-type="float">
            <text:p>0,219819</text:p>
          </table:table-cell>
          <table:table-cell office:value-type="float" office:value="32.046771" calcext:value-type="float">
            <text:p>32,046771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0.207789" calcext:value-type="float">
            <text:p>0,207789</text:p>
          </table:table-cell>
          <table:table-cell office:value-type="float" office:value="30.61382" calcext:value-type="float">
            <text:p>30,61382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0.198352" calcext:value-type="float">
            <text:p>0,198352</text:p>
          </table:table-cell>
          <table:table-cell office:value-type="float" office:value="29.110519" calcext:value-type="float">
            <text:p>29,110519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0.189215" calcext:value-type="float">
            <text:p>0,189215</text:p>
          </table:table-cell>
          <table:table-cell office:value-type="float" office:value="27.81794" calcext:value-type="float">
            <text:p>27,81794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186072" calcext:value-type="float">
            <text:p>0,186072</text:p>
          </table:table-cell>
          <table:table-cell office:value-type="float" office:value="26.926465" calcext:value-type="float">
            <text:p>26,926465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0.17469" calcext:value-type="float">
            <text:p>0,17469</text:p>
          </table:table-cell>
          <table:table-cell office:value-type="float" office:value="25.733162" calcext:value-type="float">
            <text:p>25,733162</text:p>
          </table:table-cell>
        </table:table-row>
        <table:table-row table:style-name="ro1">
          <table:table-cell office:value-type="float" office:value="1.01" calcext:value-type="float">
            <text:p>1,01</text:p>
          </table:table-cell>
          <table:table-cell office:value-type="float" office:value="0.164622" calcext:value-type="float">
            <text:p>0,164622</text:p>
          </table:table-cell>
          <table:table-cell office:value-type="float" office:value="25.947093" calcext:value-type="float">
            <text:p>25,947093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0.160688" calcext:value-type="float">
            <text:p>0,160688</text:p>
          </table:table-cell>
          <table:table-cell office:value-type="float" office:value="24.963562" calcext:value-type="float">
            <text:p>24,963562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0.160019" calcext:value-type="float">
            <text:p>0,160019</text:p>
          </table:table-cell>
          <table:table-cell office:value-type="float" office:value="23.368563" calcext:value-type="float">
            <text:p>23,368563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147098" calcext:value-type="float">
            <text:p>0,147098</text:p>
          </table:table-cell>
          <table:table-cell office:value-type="float" office:value="23.561881" calcext:value-type="float">
            <text:p>23,561881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  <table:table-cell office:value-type="float" office:value="0.150064" calcext:value-type="float">
            <text:p>0,150064</text:p>
          </table:table-cell>
          <table:table-cell office:value-type="float" office:value="22.494206" calcext:value-type="float">
            <text:p>22,494206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0.144373" calcext:value-type="float">
            <text:p>0,144373</text:p>
          </table:table-cell>
          <table:table-cell office:value-type="float" office:value="21.866048" calcext:value-type="float">
            <text:p>21,866048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0.140583" calcext:value-type="float">
            <text:p>0,140583</text:p>
          </table:table-cell>
          <table:table-cell office:value-type="float" office:value="21.130617" calcext:value-type="float">
            <text:p>21,130617</text:p>
          </table:table-cell>
        </table:table-row>
        <table:table-row table:style-name="ro1">
          <table:table-cell office:value-type="float" office:value="1.22" calcext:value-type="float">
            <text:p>1,22</text:p>
          </table:table-cell>
          <table:table-cell office:value-type="float" office:value="0.136081" calcext:value-type="float">
            <text:p>0,136081</text:p>
          </table:table-cell>
          <table:table-cell office:value-type="float" office:value="21.444264" calcext:value-type="float">
            <text:p>21,444264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133206" calcext:value-type="float">
            <text:p>0,133206</text:p>
          </table:table-cell>
          <table:table-cell office:value-type="float" office:value="21.802679" calcext:value-type="float">
            <text:p>21,802679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  <table:table-cell office:value-type="float" office:value="0.130586" calcext:value-type="float">
            <text:p>0,130586</text:p>
          </table:table-cell>
          <table:table-cell office:value-type="float" office:value="21.364123" calcext:value-type="float">
            <text:p>21,364123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  <table:table-cell office:value-type="float" office:value="0.127275" calcext:value-type="float">
            <text:p>0,127275</text:p>
          </table:table-cell>
          <table:table-cell office:value-type="float" office:value="20.914935" calcext:value-type="float">
            <text:p>20,914935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  <table:table-cell office:value-type="float" office:value="0.125345" calcext:value-type="float">
            <text:p>0,125345</text:p>
          </table:table-cell>
          <table:table-cell office:value-type="float" office:value="20.764824" calcext:value-type="float">
            <text:p>20,764824</text:p>
          </table:table-cell>
        </table:table-row>
        <table:table-row table:style-name="ro1">
          <table:table-cell office:value-type="float" office:value="1.37" calcext:value-type="float">
            <text:p>1,37</text:p>
          </table:table-cell>
          <table:table-cell office:value-type="float" office:value="0.125535" calcext:value-type="float">
            <text:p>0,125535</text:p>
          </table:table-cell>
          <table:table-cell office:value-type="float" office:value="20.840228" calcext:value-type="float">
            <text:p>20,840228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136548" calcext:value-type="float">
            <text:p>0,136548</text:p>
          </table:table-cell>
          <table:table-cell office:value-type="float" office:value="20.297378" calcext:value-type="float">
            <text:p>20,297378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  <table:table-cell office:value-type="float" office:value="0.137499" calcext:value-type="float">
            <text:p>0,137499</text:p>
          </table:table-cell>
          <table:table-cell office:value-type="float" office:value="20.460211" calcext:value-type="float">
            <text:p>20,460211</text:p>
          </table:table-cell>
        </table:table-row>
        <table:table-row table:style-name="ro1">
          <table:table-cell office:value-type="float" office:value="1.46" calcext:value-type="float">
            <text:p>1,46</text:p>
          </table:table-cell>
          <table:table-cell office:value-type="float" office:value="0.131018" calcext:value-type="float">
            <text:p>0,131018</text:p>
          </table:table-cell>
          <table:table-cell office:value-type="float" office:value="20.458319" calcext:value-type="float">
            <text:p>20,458319</text:p>
          </table:table-cell>
        </table:table-row>
        <table:table-row table:style-name="ro1">
          <table:table-cell office:value-type="float" office:value="1.49" calcext:value-type="float">
            <text:p>1,49</text:p>
          </table:table-cell>
          <table:table-cell office:value-type="float" office:value="0.13406" calcext:value-type="float">
            <text:p>0,13406</text:p>
          </table:table-cell>
          <table:table-cell office:value-type="float" office:value="20.490966" calcext:value-type="float">
            <text:p>20,490966</text:p>
          </table:table-cell>
        </table:table-row>
        <table:table-row table:style-name="ro1">
          <table:table-cell office:value-type="float" office:value="1.52" calcext:value-type="float">
            <text:p>1,52</text:p>
          </table:table-cell>
          <table:table-cell office:value-type="float" office:value="0.135031" calcext:value-type="float">
            <text:p>0,135031</text:p>
          </table:table-cell>
          <table:table-cell office:value-type="float" office:value="20.573635" calcext:value-type="float">
            <text:p>20,573635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140536" calcext:value-type="float">
            <text:p>0,140536</text:p>
          </table:table-cell>
          <table:table-cell office:value-type="float" office:value="21.181348" calcext:value-type="float">
            <text:p>21,181348</text:p>
          </table:table-cell>
        </table:table-row>
        <table:table-row table:style-name="ro1">
          <table:table-cell office:value-type="float" office:value="1.58" calcext:value-type="float">
            <text:p>1,58</text:p>
          </table:table-cell>
          <table:table-cell office:value-type="float" office:value="0.147201" calcext:value-type="float">
            <text:p>0,147201</text:p>
          </table:table-cell>
          <table:table-cell office:value-type="float" office:value="20.733989" calcext:value-type="float">
            <text:p>20,733989</text:p>
          </table:table-cell>
        </table:table-row>
        <table:table-row table:style-name="ro1">
          <table:table-cell office:value-type="float" office:value="1.61" calcext:value-type="float">
            <text:p>1,61</text:p>
          </table:table-cell>
          <table:table-cell office:value-type="float" office:value="0.145935" calcext:value-type="float">
            <text:p>0,145935</text:p>
          </table:table-cell>
          <table:table-cell office:value-type="float" office:value="20.461623" calcext:value-type="float">
            <text:p>20,461623</text:p>
          </table:table-cell>
        </table:table-row>
        <table:table-row table:style-name="ro1">
          <table:table-cell office:value-type="float" office:value="1.64" calcext:value-type="float">
            <text:p>1,64</text:p>
          </table:table-cell>
          <table:table-cell office:value-type="float" office:value="0.152483" calcext:value-type="float">
            <text:p>0,152483</text:p>
          </table:table-cell>
          <table:table-cell office:value-type="float" office:value="21.133774" calcext:value-type="float">
            <text:p>21,133774</text:p>
          </table:table-cell>
        </table:table-row>
        <table:table-row table:style-name="ro1">
          <table:table-cell office:value-type="float" office:value="1.67" calcext:value-type="float">
            <text:p>1,67</text:p>
          </table:table-cell>
          <table:table-cell office:value-type="float" office:value="0.14689" calcext:value-type="float">
            <text:p>0,14689</text:p>
          </table:table-cell>
          <table:table-cell office:value-type="float" office:value="21.447215" calcext:value-type="float">
            <text:p>21,447215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153737" calcext:value-type="float">
            <text:p>0,153737</text:p>
          </table:table-cell>
          <table:table-cell office:value-type="float" office:value="20.963137" calcext:value-type="float">
            <text:p>20,963137</text:p>
          </table:table-cell>
        </table:table-row>
        <table:table-row table:style-name="ro1">
          <table:table-cell office:value-type="float" office:value="1.73" calcext:value-type="float">
            <text:p>1,73</text:p>
          </table:table-cell>
          <table:table-cell office:value-type="float" office:value="0.152802" calcext:value-type="float">
            <text:p>0,152802</text:p>
          </table:table-cell>
          <table:table-cell office:value-type="float" office:value="22.041464" calcext:value-type="float">
            <text:p>22,041464</text:p>
          </table:table-cell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0.156719" calcext:value-type="float">
            <text:p>0,156719</text:p>
          </table:table-cell>
          <table:table-cell office:value-type="float" office:value="22.221007" calcext:value-type="float">
            <text:p>22,221007</text:p>
          </table:table-cell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0.160179" calcext:value-type="float">
            <text:p>0,160179</text:p>
          </table:table-cell>
          <table:table-cell office:value-type="float" office:value="22.022639" calcext:value-type="float">
            <text:p>22,022639</text:p>
          </table:table-cell>
        </table:table-row>
        <table:table-row table:style-name="ro1">
          <table:table-cell office:value-type="float" office:value="1.82" calcext:value-type="float">
            <text:p>1,82</text:p>
          </table:table-cell>
          <table:table-cell office:value-type="float" office:value="0.177064" calcext:value-type="float">
            <text:p>0,177064</text:p>
          </table:table-cell>
          <table:table-cell office:value-type="float" office:value="21.353206" calcext:value-type="float">
            <text:p>21,353206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174127" calcext:value-type="float">
            <text:p>0,174127</text:p>
          </table:table-cell>
          <table:table-cell office:value-type="float" office:value="22.295255" calcext:value-type="float">
            <text:p>22,295255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office:value-type="float" office:value="0.179335" calcext:value-type="float">
            <text:p>0,179335</text:p>
          </table:table-cell>
          <table:table-cell office:value-type="float" office:value="22.328124" calcext:value-type="float">
            <text:p>22,328124</text:p>
          </table:table-cell>
        </table:table-row>
        <table:table-row table:style-name="ro1">
          <table:table-cell office:value-type="float" office:value="1.91" calcext:value-type="float">
            <text:p>1,91</text:p>
          </table:table-cell>
          <table:table-cell office:value-type="float" office:value="0.182159" calcext:value-type="float">
            <text:p>0,182159</text:p>
          </table:table-cell>
          <table:table-cell office:value-type="float" office:value="22.346148" calcext:value-type="float">
            <text:p>22,346148</text:p>
          </table:table-cell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0.188553" calcext:value-type="float">
            <text:p>0,188553</text:p>
          </table:table-cell>
          <table:table-cell office:value-type="float" office:value="22.677434" calcext:value-type="float">
            <text:p>22,677434</text:p>
          </table:table-cell>
        </table:table-row>
        <table:table-row table:style-name="ro1">
          <table:table-cell office:value-type="float" office:value="1.97" calcext:value-type="float">
            <text:p>1,97</text:p>
          </table:table-cell>
          <table:table-cell office:value-type="float" office:value="0.190476" calcext:value-type="float">
            <text:p>0,190476</text:p>
          </table:table-cell>
          <table:table-cell office:value-type="float" office:value="22.893763" calcext:value-type="float">
            <text:p>22,8937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5444" calcext:value-type="float">
            <text:p>0,195444</text:p>
          </table:table-cell>
          <table:table-cell office:value-type="float" office:value="23.213417" calcext:value-type="float">
            <text:p>23,2134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19T14:08:49.669791100</dc:date>
    <meta:editing-duration>PT8M2S</meta:editing-duration>
    <meta:editing-cycles>1</meta:editing-cycles>
    <meta:document-statistic meta:table-count="1" meta:cell-count="156" meta:object-count="2"/>
    <meta:generator>LibreOffice/25.8.6.2$Windows_X86_64 LibreOffice_project/b4b39682cd9868fa725bc664aff94278d315bd04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1.91cm" svg:y="0.315cm" chart:style-name="ch2">
          <text:p>RMSD_dist en fonction de k_attractivité1 avec k_repulsion = 1,7 et k_attractivité2 = 1,22</text:p>
        </chart:title>
        <chart:legend chart:legend-position="end" svg:x="12.917cm" svg:y="4.201cm" style:legend-expansion="high" chart:style-name="ch3"/>
        <chart:plot-area chart:style-name="ch4" svg:x="1.331cm" svg:y="1.778cm" svg:width="11.266cm" svg:height="6.061cm">
          <chart:coordinate-region svg:x="2.251cm" svg:y="1.978cm" svg:width="10.105cm" svg:height="5.214cm"/>
          <chart:axis chart:dimension="x" chart:name="primary-x" chart:style-name="ch5">
            <chart:title svg:x="5.901cm" svg:y="8.019cm" chart:style-name="ch2">
              <text:p><text:span text:style-name="T1">K_attractivité1</text:span></text:p>
            </chart:title>
          </chart:axis>
          <chart:axis chart:dimension="y" chart:name="primary-y" chart:style-name="ch6">
            <chart:title svg:x="0.451cm" svg:y="5.668cm" chart:style-name="ch7">
              <text:p><text:span text:style-name="T2">RMSD_dist</text:span></text:p>
            </chart:title>
            <chart:grid chart:style-name="ch8" chart:class="major"/>
          </chart:axis>
          <chart:series chart:style-name="ch9" chart:values-cell-range-address="'Result_k_repulsion_1.700000_k_attraction2_1.220000'.B2:'Result_k_repulsion_1.700000_k_attraction2_1.220000'.B52" chart:label-cell-address="'Result_k_repulsion_1.700000_k_attraction2_1.220000'.B1:'Result_k_repulsion_1.700000_k_attraction2_1.220000'.B1" chart:class="chart:scatter">
            <chart:domain table:cell-range-address="'Result_k_repulsion_1.700000_k_attraction2_1.220000'.A2:'Result_k_repulsion_1.700000_k_attraction2_1.220000'.A52"/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MSD_dist</text:p>
                <draw:g>
                  <svg:desc>'Result_k_repulsion_1.700000_k_attraction2_1.220000'.B1:'Result_k_repulsion_1.700000_k_attraction2_1.2200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Result_k_repulsion_1.700000_k_attraction2_1.220000'.A2:'Result_k_repulsion_1.700000_k_attraction2_1.220000'.A52</svg:desc>
                </draw:g>
              </table:table-cell>
              <table:table-cell office:value-type="float" office:value="0.291861">
                <text:p>0.291861</text:p>
                <draw:g>
                  <svg:desc>'Result_k_repulsion_1.700000_k_attraction2_1.220000'.B2:'Result_k_repulsion_1.700000_k_attraction2_1.220000'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">
                <text:p>0.53</text:p>
              </table:table-cell>
              <table:table-cell office:value-type="float" office:value="0.293145">
                <text:p>0.293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">
                <text:p>0.56</text:p>
              </table:table-cell>
              <table:table-cell office:value-type="float" office:value="0.292363">
                <text:p>0.292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">
                <text:p>0.59</text:p>
              </table:table-cell>
              <table:table-cell office:value-type="float" office:value="0.291898">
                <text:p>0.291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">
                <text:p>0.62</text:p>
              </table:table-cell>
              <table:table-cell office:value-type="float" office:value="0.294973">
                <text:p>0.294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0.276773">
                <text:p>0.2767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">
                <text:p>0.68</text:p>
              </table:table-cell>
              <table:table-cell office:value-type="float" office:value="0.266505">
                <text:p>0.266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">
                <text:p>0.71</text:p>
              </table:table-cell>
              <table:table-cell office:value-type="float" office:value="0.254631">
                <text:p>0.254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">
                <text:p>0.74</text:p>
              </table:table-cell>
              <table:table-cell office:value-type="float" office:value="0.246676">
                <text:p>0.246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">
                <text:p>0.77</text:p>
              </table:table-cell>
              <table:table-cell office:value-type="float" office:value="0.23179">
                <text:p>0.231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222519">
                <text:p>0.222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">
                <text:p>0.83</text:p>
              </table:table-cell>
              <table:table-cell office:value-type="float" office:value="0.219819">
                <text:p>0.2198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">
                <text:p>0.86</text:p>
              </table:table-cell>
              <table:table-cell office:value-type="float" office:value="0.207789">
                <text:p>0.207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">
                <text:p>0.89</text:p>
              </table:table-cell>
              <table:table-cell office:value-type="float" office:value="0.198352">
                <text:p>0.198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">
                <text:p>0.92</text:p>
              </table:table-cell>
              <table:table-cell office:value-type="float" office:value="0.189215">
                <text:p>0.189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">
                <text:p>0.95</text:p>
              </table:table-cell>
              <table:table-cell office:value-type="float" office:value="0.186072">
                <text:p>0.186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">
                <text:p>0.98</text:p>
              </table:table-cell>
              <table:table-cell office:value-type="float" office:value="0.17469">
                <text:p>0.174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">
                <text:p>1.01</text:p>
              </table:table-cell>
              <table:table-cell office:value-type="float" office:value="0.164622">
                <text:p>0.1646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4">
                <text:p>1.04</text:p>
              </table:table-cell>
              <table:table-cell office:value-type="float" office:value="0.160688">
                <text:p>0.1606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0.160019">
                <text:p>0.160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">
                <text:p>1.1</text:p>
              </table:table-cell>
              <table:table-cell office:value-type="float" office:value="0.147098">
                <text:p>0.147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3">
                <text:p>1.13</text:p>
              </table:table-cell>
              <table:table-cell office:value-type="float" office:value="0.150064">
                <text:p>0.150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6">
                <text:p>1.16</text:p>
              </table:table-cell>
              <table:table-cell office:value-type="float" office:value="0.144373">
                <text:p>0.1443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9">
                <text:p>1.19</text:p>
              </table:table-cell>
              <table:table-cell office:value-type="float" office:value="0.140583">
                <text:p>0.1405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2">
                <text:p>1.22</text:p>
              </table:table-cell>
              <table:table-cell office:value-type="float" office:value="0.136081">
                <text:p>0.1360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133206">
                <text:p>0.133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8">
                <text:p>1.28</text:p>
              </table:table-cell>
              <table:table-cell office:value-type="float" office:value="0.130586">
                <text:p>0.130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1">
                <text:p>1.31</text:p>
              </table:table-cell>
              <table:table-cell office:value-type="float" office:value="0.127275">
                <text:p>0.1272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4">
                <text:p>1.34</text:p>
              </table:table-cell>
              <table:table-cell office:value-type="float" office:value="0.125345">
                <text:p>0.125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7">
                <text:p>1.37</text:p>
              </table:table-cell>
              <table:table-cell office:value-type="float" office:value="0.125535">
                <text:p>0.125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">
                <text:p>1.4</text:p>
              </table:table-cell>
              <table:table-cell office:value-type="float" office:value="0.136548">
                <text:p>0.1365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3">
                <text:p>1.43</text:p>
              </table:table-cell>
              <table:table-cell office:value-type="float" office:value="0.137499">
                <text:p>0.1374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6">
                <text:p>1.46</text:p>
              </table:table-cell>
              <table:table-cell office:value-type="float" office:value="0.131018">
                <text:p>0.131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9">
                <text:p>1.49</text:p>
              </table:table-cell>
              <table:table-cell office:value-type="float" office:value="0.13406">
                <text:p>0.134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2">
                <text:p>1.52</text:p>
              </table:table-cell>
              <table:table-cell office:value-type="float" office:value="0.135031">
                <text:p>0.1350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5">
                <text:p>1.55</text:p>
              </table:table-cell>
              <table:table-cell office:value-type="float" office:value="0.140536">
                <text:p>0.140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8">
                <text:p>1.58</text:p>
              </table:table-cell>
              <table:table-cell office:value-type="float" office:value="0.147201">
                <text:p>0.1472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1">
                <text:p>1.61</text:p>
              </table:table-cell>
              <table:table-cell office:value-type="float" office:value="0.145935">
                <text:p>0.1459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4">
                <text:p>1.64</text:p>
              </table:table-cell>
              <table:table-cell office:value-type="float" office:value="0.152483">
                <text:p>0.1524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7">
                <text:p>1.67</text:p>
              </table:table-cell>
              <table:table-cell office:value-type="float" office:value="0.14689">
                <text:p>0.14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">
                <text:p>1.7</text:p>
              </table:table-cell>
              <table:table-cell office:value-type="float" office:value="0.153737">
                <text:p>0.1537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3">
                <text:p>1.73</text:p>
              </table:table-cell>
              <table:table-cell office:value-type="float" office:value="0.152802">
                <text:p>0.152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6">
                <text:p>1.76</text:p>
              </table:table-cell>
              <table:table-cell office:value-type="float" office:value="0.156719">
                <text:p>0.1567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9">
                <text:p>1.79</text:p>
              </table:table-cell>
              <table:table-cell office:value-type="float" office:value="0.160179">
                <text:p>0.1601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2">
                <text:p>1.82</text:p>
              </table:table-cell>
              <table:table-cell office:value-type="float" office:value="0.177064">
                <text:p>0.1770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5">
                <text:p>1.85</text:p>
              </table:table-cell>
              <table:table-cell office:value-type="float" office:value="0.174127">
                <text:p>0.1741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8">
                <text:p>1.88</text:p>
              </table:table-cell>
              <table:table-cell office:value-type="float" office:value="0.179335">
                <text:p>0.1793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1">
                <text:p>1.91</text:p>
              </table:table-cell>
              <table:table-cell office:value-type="float" office:value="0.182159">
                <text:p>0.1821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4">
                <text:p>1.94</text:p>
              </table:table-cell>
              <table:table-cell office:value-type="float" office:value="0.188553">
                <text:p>0.1885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7">
                <text:p>1.97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195444">
                <text:p>0.195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6.2$Windows_X86_64 LibreOffice_project/b4b39682cd9868fa725bc664aff94278d315bd0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1.835cm" svg:y="0.315cm" chart:style-name="ch2">
          <text:p>RMSD_angle en fonction de k_attractivité avec k_repulsion = 1,7 et k_attractivité2 = 1,22</text:p>
        </chart:title>
        <chart:legend chart:legend-position="end" svg:x="12.61cm" svg:y="4.201cm" style:legend-expansion="high" chart:style-name="ch3"/>
        <chart:plot-area chart:style-name="ch4" svg:x="1.331cm" svg:y="1.778cm" svg:width="10.959cm" svg:height="6.061cm">
          <chart:coordinate-region svg:x="1.966cm" svg:y="1.977cm" svg:width="10.084cm" svg:height="5.215cm"/>
          <chart:axis chart:dimension="x" chart:name="primary-x" chart:style-name="ch5">
            <chart:title svg:x="5.747cm" svg:y="8.019cm" chart:style-name="ch2">
              <text:p><text:span text:style-name="T1">K_attractivité1</text:span></text:p>
            </chart:title>
          </chart:axis>
          <chart:axis chart:dimension="y" chart:name="primary-y" chart:style-name="ch5">
            <chart:title svg:x="0.451cm" svg:y="5.809cm" chart:style-name="ch6">
              <text:p><text:span text:style-name="T2">RMSD_angle</text:span></text:p>
            </chart:title>
            <chart:grid chart:style-name="ch7" chart:class="major"/>
          </chart:axis>
          <chart:series chart:style-name="ch8" chart:values-cell-range-address="'Result_k_repulsion_1.700000_k_attraction2_1.220000'.C2:'Result_k_repulsion_1.700000_k_attraction2_1.220000'.C52" chart:label-cell-address="'Result_k_repulsion_1.700000_k_attraction2_1.220000'.C1:'Result_k_repulsion_1.700000_k_attraction2_1.220000'.C1" chart:class="chart:scatter">
            <chart:domain table:cell-range-address="'Result_k_repulsion_1.700000_k_attraction2_1.220000'.A2:'Result_k_repulsion_1.700000_k_attraction2_1.220000'.A52"/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MSD_angle</text:p>
                <draw:g>
                  <svg:desc>'Result_k_repulsion_1.700000_k_attraction2_1.220000'.C1:'Result_k_repulsion_1.700000_k_attraction2_1.2200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Result_k_repulsion_1.700000_k_attraction2_1.220000'.A2:'Result_k_repulsion_1.700000_k_attraction2_1.220000'.A52</svg:desc>
                </draw:g>
              </table:table-cell>
              <table:table-cell office:value-type="float" office:value="64.351341">
                <text:p>64.351341</text:p>
                <draw:g>
                  <svg:desc>'Result_k_repulsion_1.700000_k_attraction2_1.220000'.C2:'Result_k_repulsion_1.700000_k_attraction2_1.220000'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">
                <text:p>0.53</text:p>
              </table:table-cell>
              <table:table-cell office:value-type="float" office:value="64.341266">
                <text:p>64.341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">
                <text:p>0.56</text:p>
              </table:table-cell>
              <table:table-cell office:value-type="float" office:value="64.341325">
                <text:p>64.341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">
                <text:p>0.59</text:p>
              </table:table-cell>
              <table:table-cell office:value-type="float" office:value="64.355844">
                <text:p>64.355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">
                <text:p>0.62</text:p>
              </table:table-cell>
              <table:table-cell office:value-type="float" office:value="63.86703">
                <text:p>63.86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48.698538">
                <text:p>48.698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">
                <text:p>0.68</text:p>
              </table:table-cell>
              <table:table-cell office:value-type="float" office:value="44.974002">
                <text:p>44.974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">
                <text:p>0.71</text:p>
              </table:table-cell>
              <table:table-cell office:value-type="float" office:value="41.083927">
                <text:p>41.0839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">
                <text:p>0.74</text:p>
              </table:table-cell>
              <table:table-cell office:value-type="float" office:value="38.698162">
                <text:p>38.698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">
                <text:p>0.77</text:p>
              </table:table-cell>
              <table:table-cell office:value-type="float" office:value="36.295061">
                <text:p>36.2950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33.613413">
                <text:p>33.613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">
                <text:p>0.83</text:p>
              </table:table-cell>
              <table:table-cell office:value-type="float" office:value="32.046771">
                <text:p>32.0467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">
                <text:p>0.86</text:p>
              </table:table-cell>
              <table:table-cell office:value-type="float" office:value="30.61382">
                <text:p>30.613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">
                <text:p>0.89</text:p>
              </table:table-cell>
              <table:table-cell office:value-type="float" office:value="29.110519">
                <text:p>29.110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">
                <text:p>0.92</text:p>
              </table:table-cell>
              <table:table-cell office:value-type="float" office:value="27.81794">
                <text:p>27.81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">
                <text:p>0.95</text:p>
              </table:table-cell>
              <table:table-cell office:value-type="float" office:value="26.926465">
                <text:p>26.9264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">
                <text:p>0.98</text:p>
              </table:table-cell>
              <table:table-cell office:value-type="float" office:value="25.733162">
                <text:p>25.7331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">
                <text:p>1.01</text:p>
              </table:table-cell>
              <table:table-cell office:value-type="float" office:value="25.947093">
                <text:p>25.9470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4">
                <text:p>1.04</text:p>
              </table:table-cell>
              <table:table-cell office:value-type="float" office:value="24.963562">
                <text:p>24.9635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23.368563">
                <text:p>23.3685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">
                <text:p>1.1</text:p>
              </table:table-cell>
              <table:table-cell office:value-type="float" office:value="23.561881">
                <text:p>23.5618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3">
                <text:p>1.13</text:p>
              </table:table-cell>
              <table:table-cell office:value-type="float" office:value="22.494206">
                <text:p>22.4942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6">
                <text:p>1.16</text:p>
              </table:table-cell>
              <table:table-cell office:value-type="float" office:value="21.866048">
                <text:p>21.866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9">
                <text:p>1.19</text:p>
              </table:table-cell>
              <table:table-cell office:value-type="float" office:value="21.130617">
                <text:p>21.130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2">
                <text:p>1.22</text:p>
              </table:table-cell>
              <table:table-cell office:value-type="float" office:value="21.444264">
                <text:p>21.4442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21.802679">
                <text:p>21.8026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8">
                <text:p>1.28</text:p>
              </table:table-cell>
              <table:table-cell office:value-type="float" office:value="21.364123">
                <text:p>21.3641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1">
                <text:p>1.31</text:p>
              </table:table-cell>
              <table:table-cell office:value-type="float" office:value="20.914935">
                <text:p>20.9149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4">
                <text:p>1.34</text:p>
              </table:table-cell>
              <table:table-cell office:value-type="float" office:value="20.764824">
                <text:p>20.7648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7">
                <text:p>1.37</text:p>
              </table:table-cell>
              <table:table-cell office:value-type="float" office:value="20.840228">
                <text:p>20.840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">
                <text:p>1.4</text:p>
              </table:table-cell>
              <table:table-cell office:value-type="float" office:value="20.297378">
                <text:p>20.2973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3">
                <text:p>1.43</text:p>
              </table:table-cell>
              <table:table-cell office:value-type="float" office:value="20.460211">
                <text:p>20.4602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6">
                <text:p>1.46</text:p>
              </table:table-cell>
              <table:table-cell office:value-type="float" office:value="20.458319">
                <text:p>20.458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9">
                <text:p>1.49</text:p>
              </table:table-cell>
              <table:table-cell office:value-type="float" office:value="20.490966">
                <text:p>20.4909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2">
                <text:p>1.52</text:p>
              </table:table-cell>
              <table:table-cell office:value-type="float" office:value="20.573635">
                <text:p>20.5736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5">
                <text:p>1.55</text:p>
              </table:table-cell>
              <table:table-cell office:value-type="float" office:value="21.181348">
                <text:p>21.181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8">
                <text:p>1.58</text:p>
              </table:table-cell>
              <table:table-cell office:value-type="float" office:value="20.733989">
                <text:p>20.7339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1">
                <text:p>1.61</text:p>
              </table:table-cell>
              <table:table-cell office:value-type="float" office:value="20.461623">
                <text:p>20.461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4">
                <text:p>1.64</text:p>
              </table:table-cell>
              <table:table-cell office:value-type="float" office:value="21.133774">
                <text:p>21.1337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7">
                <text:p>1.67</text:p>
              </table:table-cell>
              <table:table-cell office:value-type="float" office:value="21.447215">
                <text:p>21.4472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">
                <text:p>1.7</text:p>
              </table:table-cell>
              <table:table-cell office:value-type="float" office:value="20.963137">
                <text:p>20.9631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3">
                <text:p>1.73</text:p>
              </table:table-cell>
              <table:table-cell office:value-type="float" office:value="22.041464">
                <text:p>22.0414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6">
                <text:p>1.76</text:p>
              </table:table-cell>
              <table:table-cell office:value-type="float" office:value="22.221007">
                <text:p>22.2210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9">
                <text:p>1.79</text:p>
              </table:table-cell>
              <table:table-cell office:value-type="float" office:value="22.022639">
                <text:p>22.0226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2">
                <text:p>1.82</text:p>
              </table:table-cell>
              <table:table-cell office:value-type="float" office:value="21.353206">
                <text:p>21.3532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5">
                <text:p>1.85</text:p>
              </table:table-cell>
              <table:table-cell office:value-type="float" office:value="22.295255">
                <text:p>22.295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8">
                <text:p>1.88</text:p>
              </table:table-cell>
              <table:table-cell office:value-type="float" office:value="22.328124">
                <text:p>22.3281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1">
                <text:p>1.91</text:p>
              </table:table-cell>
              <table:table-cell office:value-type="float" office:value="22.346148">
                <text:p>22.3461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4">
                <text:p>1.94</text:p>
              </table:table-cell>
              <table:table-cell office:value-type="float" office:value="22.677434">
                <text:p>22.677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7">
                <text:p>1.97</text:p>
              </table:table-cell>
              <table:table-cell office:value-type="float" office:value="22.893763">
                <text:p>22.8937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23.213417">
                <text:p>23.2134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6.2$Windows_X86_64 LibreOffice_project/b4b39682cd9868fa725bc664aff94278d315bd04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