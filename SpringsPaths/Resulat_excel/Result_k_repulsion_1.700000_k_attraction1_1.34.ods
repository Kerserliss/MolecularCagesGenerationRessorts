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6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_k_repulsion_1.700000_k_attraction1_0.500000" table:style-name="ta1">
        <table:shapes>
          <draw:frame draw:z-index="0" draw:style-name="gr1" draw:text-style-name="P1" svg:width="15.999cm" svg:height="8.999cm" svg:x="9.402cm" svg:y="0.472cm">
            <draw:object draw:notify-on-update-of-ranges="'Result_k_repulsion_1.700000_k_attraction1_0.500000'.A2:'Result_k_repulsion_1.700000_k_attraction1_0.500000'.A151 'Result_k_repulsion_1.700000_k_attraction1_0.500000'.B1:'Result_k_repulsion_1.700000_k_attraction1_0.500000'.B1 'Result_k_repulsion_1.700000_k_attraction1_0.500000'.B1:'Result_k_repulsion_1.700000_k_attraction1_0.500000'.B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9.412cm" svg:y="9.955cm">
            <draw:object draw:notify-on-update-of-ranges="'Result_k_repulsion_1.700000_k_attraction1_0.500000'.A2:'Result_k_repulsion_1.700000_k_attraction1_0.500000'.A151 'Result_k_repulsion_1.700000_k_attraction1_0.500000'.C1:'Result_k_repulsion_1.700000_k_attraction1_0.500000'.C1 'Result_k_repulsion_1.700000_k_attraction1_0.500000'.C1:'Result_k_repulsion_1.700000_k_attraction1_0.500000'.C1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_attractivité1</text:p>
          </table:table-cell>
          <table:table-cell office:value-type="string" calcext:value-type="string">
            <text:p>RMSD_dist</text:p>
          </table:table-cell>
          <table:table-cell office:value-type="string" calcext:value-type="string">
            <text:p>RMSD_angle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192137" calcext:value-type="float">
            <text:p>0,192137</text:p>
          </table:table-cell>
          <table:table-cell office:value-type="float" office:value="26.658165" calcext:value-type="float">
            <text:p>26,658165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 office:value-type="float" office:value="0.191789" calcext:value-type="float">
            <text:p>0,191789</text:p>
          </table:table-cell>
          <table:table-cell office:value-type="float" office:value="26.040041" calcext:value-type="float">
            <text:p>26,040041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0.188389" calcext:value-type="float">
            <text:p>0,188389</text:p>
          </table:table-cell>
          <table:table-cell office:value-type="float" office:value="25.391061" calcext:value-type="float">
            <text:p>25,391061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0.182165" calcext:value-type="float">
            <text:p>0,182165</text:p>
          </table:table-cell>
          <table:table-cell office:value-type="float" office:value="25.374517" calcext:value-type="float">
            <text:p>25,374517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0.17538" calcext:value-type="float">
            <text:p>0,17538</text:p>
          </table:table-cell>
          <table:table-cell office:value-type="float" office:value="24.718861" calcext:value-type="float">
            <text:p>24,718861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170976" calcext:value-type="float">
            <text:p>0,170976</text:p>
          </table:table-cell>
          <table:table-cell office:value-type="float" office:value="24.451829" calcext:value-type="float">
            <text:p>24,451829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0.173671" calcext:value-type="float">
            <text:p>0,173671</text:p>
          </table:table-cell>
          <table:table-cell office:value-type="float" office:value="24.02558" calcext:value-type="float">
            <text:p>24,02558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0.158752" calcext:value-type="float">
            <text:p>0,158752</text:p>
          </table:table-cell>
          <table:table-cell office:value-type="float" office:value="23.935385" calcext:value-type="float">
            <text:p>23,935385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0.166043" calcext:value-type="float">
            <text:p>0,166043</text:p>
          </table:table-cell>
          <table:table-cell office:value-type="float" office:value="23.554099" calcext:value-type="float">
            <text:p>23,554099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0.157015" calcext:value-type="float">
            <text:p>0,157015</text:p>
          </table:table-cell>
          <table:table-cell office:value-type="float" office:value="23.116815" calcext:value-type="float">
            <text:p>23,11681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1571" calcext:value-type="float">
            <text:p>0,1571</text:p>
          </table:table-cell>
          <table:table-cell office:value-type="float" office:value="23.09336" calcext:value-type="float">
            <text:p>23,09336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0.157206" calcext:value-type="float">
            <text:p>0,157206</text:p>
          </table:table-cell>
          <table:table-cell office:value-type="float" office:value="22.632391" calcext:value-type="float">
            <text:p>22,632391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0.151349" calcext:value-type="float">
            <text:p>0,151349</text:p>
          </table:table-cell>
          <table:table-cell office:value-type="float" office:value="22.830986" calcext:value-type="float">
            <text:p>22,830986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 office:value-type="float" office:value="0.147847" calcext:value-type="float">
            <text:p>0,147847</text:p>
          </table:table-cell>
          <table:table-cell office:value-type="float" office:value="22.659801" calcext:value-type="float">
            <text:p>22,659801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0.151246" calcext:value-type="float">
            <text:p>0,151246</text:p>
          </table:table-cell>
          <table:table-cell office:value-type="float" office:value="22.18374" calcext:value-type="float">
            <text:p>22,18374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141622" calcext:value-type="float">
            <text:p>0,141622</text:p>
          </table:table-cell>
          <table:table-cell office:value-type="float" office:value="22.09799" calcext:value-type="float">
            <text:p>22,09799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0.144335" calcext:value-type="float">
            <text:p>0,144335</text:p>
          </table:table-cell>
          <table:table-cell office:value-type="float" office:value="21.743557" calcext:value-type="float">
            <text:p>21,743557</text:p>
          </table:table-cell>
        </table:table-row>
        <table:table-row table:style-name="ro1">
          <table:table-cell office:value-type="float" office:value="1.01" calcext:value-type="float">
            <text:p>1,01</text:p>
          </table:table-cell>
          <table:table-cell office:value-type="float" office:value="0.143366" calcext:value-type="float">
            <text:p>0,143366</text:p>
          </table:table-cell>
          <table:table-cell office:value-type="float" office:value="21.613302" calcext:value-type="float">
            <text:p>21,613302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0.141579" calcext:value-type="float">
            <text:p>0,141579</text:p>
          </table:table-cell>
          <table:table-cell office:value-type="float" office:value="21.550269" calcext:value-type="float">
            <text:p>21,550269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  <table:table-cell office:value-type="float" office:value="0.138408" calcext:value-type="float">
            <text:p>0,138408</text:p>
          </table:table-cell>
          <table:table-cell office:value-type="float" office:value="21.395175" calcext:value-type="float">
            <text:p>21,395175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137881" calcext:value-type="float">
            <text:p>0,137881</text:p>
          </table:table-cell>
          <table:table-cell office:value-type="float" office:value="21.351399" calcext:value-type="float">
            <text:p>21,351399</text:p>
          </table:table-cell>
        </table:table-row>
        <table:table-row table:style-name="ro1">
          <table:table-cell office:value-type="float" office:value="1.13" calcext:value-type="float">
            <text:p>1,13</text:p>
          </table:table-cell>
          <table:table-cell office:value-type="float" office:value="0.132371" calcext:value-type="float">
            <text:p>0,132371</text:p>
          </table:table-cell>
          <table:table-cell office:value-type="float" office:value="21.256487" calcext:value-type="float">
            <text:p>21,256487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0.129023" calcext:value-type="float">
            <text:p>0,129023</text:p>
          </table:table-cell>
          <table:table-cell office:value-type="float" office:value="21.192409" calcext:value-type="float">
            <text:p>21,192409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  <table:table-cell office:value-type="float" office:value="0.124488" calcext:value-type="float">
            <text:p>0,124488</text:p>
          </table:table-cell>
          <table:table-cell office:value-type="float" office:value="21.099486" calcext:value-type="float">
            <text:p>21,099486</text:p>
          </table:table-cell>
        </table:table-row>
        <table:table-row table:style-name="ro1">
          <table:table-cell office:value-type="float" office:value="1.22" calcext:value-type="float">
            <text:p>1,22</text:p>
          </table:table-cell>
          <table:table-cell office:value-type="float" office:value="0.136604" calcext:value-type="float">
            <text:p>0,136604</text:p>
          </table:table-cell>
          <table:table-cell office:value-type="float" office:value="19.880859" calcext:value-type="float">
            <text:p>19,880859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131941" calcext:value-type="float">
            <text:p>0,131941</text:p>
          </table:table-cell>
          <table:table-cell office:value-type="float" office:value="20.633689" calcext:value-type="float">
            <text:p>20,633689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  <table:table-cell office:value-type="float" office:value="0.123668" calcext:value-type="float">
            <text:p>0,123668</text:p>
          </table:table-cell>
          <table:table-cell office:value-type="float" office:value="21.064528" calcext:value-type="float">
            <text:p>21,064528</text:p>
          </table:table-cell>
        </table:table-row>
        <table:table-row table:style-name="ro1">
          <table:table-cell office:value-type="float" office:value="1.31" calcext:value-type="float">
            <text:p>1,31</text:p>
          </table:table-cell>
          <table:table-cell office:value-type="float" office:value="0.129132" calcext:value-type="float">
            <text:p>0,129132</text:p>
          </table:table-cell>
          <table:table-cell office:value-type="float" office:value="20.542146" calcext:value-type="float">
            <text:p>20,542146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  <table:table-cell office:value-type="float" office:value="0.1209" calcext:value-type="float">
            <text:p>0,1209</text:p>
          </table:table-cell>
          <table:table-cell office:value-type="float" office:value="20.341438" calcext:value-type="float">
            <text:p>20,341438</text:p>
          </table:table-cell>
        </table:table-row>
        <table:table-row table:style-name="ro1">
          <table:table-cell office:value-type="float" office:value="1.37" calcext:value-type="float">
            <text:p>1,37</text:p>
          </table:table-cell>
          <table:table-cell office:value-type="float" office:value="0.125481" calcext:value-type="float">
            <text:p>0,125481</text:p>
          </table:table-cell>
          <table:table-cell office:value-type="float" office:value="20.413838" calcext:value-type="float">
            <text:p>20,413838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12485" calcext:value-type="float">
            <text:p>0,12485</text:p>
          </table:table-cell>
          <table:table-cell office:value-type="float" office:value="20.262824" calcext:value-type="float">
            <text:p>20,262824</text:p>
          </table:table-cell>
        </table:table-row>
        <table:table-row table:style-name="ro1">
          <table:table-cell office:value-type="float" office:value="1.43" calcext:value-type="float">
            <text:p>1,43</text:p>
          </table:table-cell>
          <table:table-cell office:value-type="float" office:value="0.119196" calcext:value-type="float">
            <text:p>0,119196</text:p>
          </table:table-cell>
          <table:table-cell office:value-type="float" office:value="20.583483" calcext:value-type="float">
            <text:p>20,583483</text:p>
          </table:table-cell>
        </table:table-row>
        <table:table-row table:style-name="ro1">
          <table:table-cell office:value-type="float" office:value="1.46" calcext:value-type="float">
            <text:p>1,46</text:p>
          </table:table-cell>
          <table:table-cell office:value-type="float" office:value="0.123811" calcext:value-type="float">
            <text:p>0,123811</text:p>
          </table:table-cell>
          <table:table-cell office:value-type="float" office:value="20.090963" calcext:value-type="float">
            <text:p>20,090963</text:p>
          </table:table-cell>
        </table:table-row>
        <table:table-row table:style-name="ro1">
          <table:table-cell office:value-type="float" office:value="1.49" calcext:value-type="float">
            <text:p>1,49</text:p>
          </table:table-cell>
          <table:table-cell office:value-type="float" office:value="0.122583" calcext:value-type="float">
            <text:p>0,122583</text:p>
          </table:table-cell>
          <table:table-cell office:value-type="float" office:value="20.032743" calcext:value-type="float">
            <text:p>20,032743</text:p>
          </table:table-cell>
        </table:table-row>
        <table:table-row table:style-name="ro1">
          <table:table-cell office:value-type="float" office:value="1.52" calcext:value-type="float">
            <text:p>1,52</text:p>
          </table:table-cell>
          <table:table-cell office:value-type="float" office:value="0.113835" calcext:value-type="float">
            <text:p>0,113835</text:p>
          </table:table-cell>
          <table:table-cell office:value-type="float" office:value="20.032803" calcext:value-type="float">
            <text:p>20,032803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0.107492" calcext:value-type="float">
            <text:p>0,107492</text:p>
          </table:table-cell>
          <table:table-cell office:value-type="float" office:value="20.134459" calcext:value-type="float">
            <text:p>20,134459</text:p>
          </table:table-cell>
        </table:table-row>
        <table:table-row table:style-name="ro1">
          <table:table-cell office:value-type="float" office:value="1.58" calcext:value-type="float">
            <text:p>1,58</text:p>
          </table:table-cell>
          <table:table-cell office:value-type="float" office:value="0.11065" calcext:value-type="float">
            <text:p>0,11065</text:p>
          </table:table-cell>
          <table:table-cell office:value-type="float" office:value="19.843252" calcext:value-type="float">
            <text:p>19,843252</text:p>
          </table:table-cell>
        </table:table-row>
        <table:table-row table:style-name="ro1">
          <table:table-cell office:value-type="float" office:value="1.61" calcext:value-type="float">
            <text:p>1,61</text:p>
          </table:table-cell>
          <table:table-cell office:value-type="float" office:value="0.118038" calcext:value-type="float">
            <text:p>0,118038</text:p>
          </table:table-cell>
          <table:table-cell office:value-type="float" office:value="19.543549" calcext:value-type="float">
            <text:p>19,543549</text:p>
          </table:table-cell>
        </table:table-row>
        <table:table-row table:style-name="ro1">
          <table:table-cell office:value-type="float" office:value="1.64" calcext:value-type="float">
            <text:p>1,64</text:p>
          </table:table-cell>
          <table:table-cell office:value-type="float" office:value="0.117012" calcext:value-type="float">
            <text:p>0,117012</text:p>
          </table:table-cell>
          <table:table-cell office:value-type="float" office:value="19.531704" calcext:value-type="float">
            <text:p>19,531704</text:p>
          </table:table-cell>
        </table:table-row>
        <table:table-row table:style-name="ro1">
          <table:table-cell office:value-type="float" office:value="1.67" calcext:value-type="float">
            <text:p>1,67</text:p>
          </table:table-cell>
          <table:table-cell office:value-type="float" office:value="0.115139" calcext:value-type="float">
            <text:p>0,115139</text:p>
          </table:table-cell>
          <table:table-cell office:value-type="float" office:value="19.800298" calcext:value-type="float">
            <text:p>19,800298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106325" calcext:value-type="float">
            <text:p>0,106325</text:p>
          </table:table-cell>
          <table:table-cell office:value-type="float" office:value="19.68759" calcext:value-type="float">
            <text:p>19,68759</text:p>
          </table:table-cell>
        </table:table-row>
        <table:table-row table:style-name="ro1">
          <table:table-cell office:value-type="float" office:value="1.73" calcext:value-type="float">
            <text:p>1,73</text:p>
          </table:table-cell>
          <table:table-cell office:value-type="float" office:value="0.112235" calcext:value-type="float">
            <text:p>0,112235</text:p>
          </table:table-cell>
          <table:table-cell office:value-type="float" office:value="19.960366" calcext:value-type="float">
            <text:p>19,960366</text:p>
          </table:table-cell>
        </table:table-row>
        <table:table-row table:style-name="ro1">
          <table:table-cell office:value-type="float" office:value="1.76" calcext:value-type="float">
            <text:p>1,76</text:p>
          </table:table-cell>
          <table:table-cell office:value-type="float" office:value="0.10726" calcext:value-type="float">
            <text:p>0,10726</text:p>
          </table:table-cell>
          <table:table-cell office:value-type="float" office:value="19.043006" calcext:value-type="float">
            <text:p>19,043006</text:p>
          </table:table-cell>
        </table:table-row>
        <table:table-row table:style-name="ro1">
          <table:table-cell office:value-type="float" office:value="1.79" calcext:value-type="float">
            <text:p>1,79</text:p>
          </table:table-cell>
          <table:table-cell office:value-type="float" office:value="0.105897" calcext:value-type="float">
            <text:p>0,105897</text:p>
          </table:table-cell>
          <table:table-cell office:value-type="float" office:value="19.650144" calcext:value-type="float">
            <text:p>19,650144</text:p>
          </table:table-cell>
        </table:table-row>
        <table:table-row table:style-name="ro1">
          <table:table-cell office:value-type="float" office:value="1.82" calcext:value-type="float">
            <text:p>1,82</text:p>
          </table:table-cell>
          <table:table-cell office:value-type="float" office:value="0.100845" calcext:value-type="float">
            <text:p>0,100845</text:p>
          </table:table-cell>
          <table:table-cell office:value-type="float" office:value="19.356378" calcext:value-type="float">
            <text:p>19,356378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114879" calcext:value-type="float">
            <text:p>0,114879</text:p>
          </table:table-cell>
          <table:table-cell office:value-type="float" office:value="19.055277" calcext:value-type="float">
            <text:p>19,055277</text:p>
          </table:table-cell>
        </table:table-row>
        <table:table-row table:style-name="ro1">
          <table:table-cell office:value-type="float" office:value="1.88" calcext:value-type="float">
            <text:p>1,88</text:p>
          </table:table-cell>
          <table:table-cell office:value-type="float" office:value="0.107669" calcext:value-type="float">
            <text:p>0,107669</text:p>
          </table:table-cell>
          <table:table-cell office:value-type="float" office:value="18.013958" calcext:value-type="float">
            <text:p>18,013958</text:p>
          </table:table-cell>
        </table:table-row>
        <table:table-row table:style-name="ro1">
          <table:table-cell office:value-type="float" office:value="1.91" calcext:value-type="float">
            <text:p>1,91</text:p>
          </table:table-cell>
          <table:table-cell office:value-type="float" office:value="0.100777" calcext:value-type="float">
            <text:p>0,100777</text:p>
          </table:table-cell>
          <table:table-cell office:value-type="float" office:value="20.215632" calcext:value-type="float">
            <text:p>20,215632</text:p>
          </table:table-cell>
        </table:table-row>
        <table:table-row table:style-name="ro1">
          <table:table-cell office:value-type="float" office:value="1.94" calcext:value-type="float">
            <text:p>1,94</text:p>
          </table:table-cell>
          <table:table-cell office:value-type="float" office:value="0.102437" calcext:value-type="float">
            <text:p>0,102437</text:p>
          </table:table-cell>
          <table:table-cell office:value-type="float" office:value="18.990188" calcext:value-type="float">
            <text:p>18,990188</text:p>
          </table:table-cell>
        </table:table-row>
        <table:table-row table:style-name="ro1">
          <table:table-cell office:value-type="float" office:value="1.97" calcext:value-type="float">
            <text:p>1,97</text:p>
          </table:table-cell>
          <table:table-cell office:value-type="float" office:value="0.103035" calcext:value-type="float">
            <text:p>0,103035</text:p>
          </table:table-cell>
          <table:table-cell office:value-type="float" office:value="18.803184" calcext:value-type="float">
            <text:p>18,803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4549" calcext:value-type="float">
            <text:p>0,104549</text:p>
          </table:table-cell>
          <table:table-cell office:value-type="float" office:value="19.078106" calcext:value-type="float">
            <text:p>19,078106</text:p>
          </table:table-cell>
        </table:table-row>
        <table:table-row table:style-name="ro1">
          <table:table-cell office:value-type="float" office:value="2.03" calcext:value-type="float">
            <text:p>2,03</text:p>
          </table:table-cell>
          <table:table-cell office:value-type="float" office:value="0.09693" calcext:value-type="float">
            <text:p>0,09693</text:p>
          </table:table-cell>
          <table:table-cell office:value-type="float" office:value="19.442468" calcext:value-type="float">
            <text:p>19,442468</text:p>
          </table:table-cell>
        </table:table-row>
        <table:table-row table:style-name="ro1">
          <table:table-cell office:value-type="float" office:value="2.06" calcext:value-type="float">
            <text:p>2,06</text:p>
          </table:table-cell>
          <table:table-cell office:value-type="float" office:value="0.103983" calcext:value-type="float">
            <text:p>0,103983</text:p>
          </table:table-cell>
          <table:table-cell office:value-type="float" office:value="18.81566" calcext:value-type="float">
            <text:p>18,81566</text:p>
          </table:table-cell>
        </table:table-row>
        <table:table-row table:style-name="ro1">
          <table:table-cell office:value-type="float" office:value="2.09" calcext:value-type="float">
            <text:p>2,09</text:p>
          </table:table-cell>
          <table:table-cell office:value-type="float" office:value="0.102303" calcext:value-type="float">
            <text:p>0,102303</text:p>
          </table:table-cell>
          <table:table-cell office:value-type="float" office:value="17.918421" calcext:value-type="float">
            <text:p>17,918421</text:p>
          </table:table-cell>
        </table:table-row>
        <table:table-row table:style-name="ro1">
          <table:table-cell office:value-type="float" office:value="2.12" calcext:value-type="float">
            <text:p>2,12</text:p>
          </table:table-cell>
          <table:table-cell office:value-type="float" office:value="0.097701" calcext:value-type="float">
            <text:p>0,097701</text:p>
          </table:table-cell>
          <table:table-cell office:value-type="float" office:value="18.834475" calcext:value-type="float">
            <text:p>18,834475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0.098578" calcext:value-type="float">
            <text:p>0,098578</text:p>
          </table:table-cell>
          <table:table-cell office:value-type="float" office:value="18.526838" calcext:value-type="float">
            <text:p>18,526838</text:p>
          </table:table-cell>
        </table:table-row>
        <table:table-row table:style-name="ro1">
          <table:table-cell office:value-type="float" office:value="2.18" calcext:value-type="float">
            <text:p>2,18</text:p>
          </table:table-cell>
          <table:table-cell office:value-type="float" office:value="0.097456" calcext:value-type="float">
            <text:p>0,097456</text:p>
          </table:table-cell>
          <table:table-cell office:value-type="float" office:value="18.519428" calcext:value-type="float">
            <text:p>18,519428</text:p>
          </table:table-cell>
        </table:table-row>
        <table:table-row table:style-name="ro1">
          <table:table-cell office:value-type="float" office:value="2.21" calcext:value-type="float">
            <text:p>2,21</text:p>
          </table:table-cell>
          <table:table-cell office:value-type="float" office:value="0.096966" calcext:value-type="float">
            <text:p>0,096966</text:p>
          </table:table-cell>
          <table:table-cell office:value-type="float" office:value="19.622583" calcext:value-type="float">
            <text:p>19,622583</text:p>
          </table:table-cell>
        </table:table-row>
        <table:table-row table:style-name="ro1">
          <table:table-cell office:value-type="float" office:value="2.24" calcext:value-type="float">
            <text:p>2,24</text:p>
          </table:table-cell>
          <table:table-cell office:value-type="float" office:value="0.097046" calcext:value-type="float">
            <text:p>0,097046</text:p>
          </table:table-cell>
          <table:table-cell office:value-type="float" office:value="18.936532" calcext:value-type="float">
            <text:p>18,936532</text:p>
          </table:table-cell>
        </table:table-row>
        <table:table-row table:style-name="ro1">
          <table:table-cell office:value-type="float" office:value="2.27" calcext:value-type="float">
            <text:p>2,27</text:p>
          </table:table-cell>
          <table:table-cell office:value-type="float" office:value="0.092109" calcext:value-type="float">
            <text:p>0,092109</text:p>
          </table:table-cell>
          <table:table-cell office:value-type="float" office:value="19.180678" calcext:value-type="float">
            <text:p>19,180678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086104" calcext:value-type="float">
            <text:p>0,086104</text:p>
          </table:table-cell>
          <table:table-cell office:value-type="float" office:value="18.578781" calcext:value-type="float">
            <text:p>18,578781</text:p>
          </table:table-cell>
        </table:table-row>
        <table:table-row table:style-name="ro1">
          <table:table-cell office:value-type="float" office:value="2.33" calcext:value-type="float">
            <text:p>2,33</text:p>
          </table:table-cell>
          <table:table-cell office:value-type="float" office:value="0.096735" calcext:value-type="float">
            <text:p>0,096735</text:p>
          </table:table-cell>
          <table:table-cell office:value-type="float" office:value="18.88761" calcext:value-type="float">
            <text:p>18,88761</text:p>
          </table:table-cell>
        </table:table-row>
        <table:table-row table:style-name="ro1">
          <table:table-cell office:value-type="float" office:value="2.36" calcext:value-type="float">
            <text:p>2,36</text:p>
          </table:table-cell>
          <table:table-cell office:value-type="float" office:value="0.098843" calcext:value-type="float">
            <text:p>0,098843</text:p>
          </table:table-cell>
          <table:table-cell office:value-type="float" office:value="17.19606" calcext:value-type="float">
            <text:p>17,19606</text:p>
          </table:table-cell>
        </table:table-row>
        <table:table-row table:style-name="ro1">
          <table:table-cell office:value-type="float" office:value="2.39" calcext:value-type="float">
            <text:p>2,39</text:p>
          </table:table-cell>
          <table:table-cell office:value-type="float" office:value="0.10179" calcext:value-type="float">
            <text:p>0,10179</text:p>
          </table:table-cell>
          <table:table-cell office:value-type="float" office:value="18.215638" calcext:value-type="float">
            <text:p>18,215638</text:p>
          </table:table-cell>
        </table:table-row>
        <table:table-row table:style-name="ro1">
          <table:table-cell office:value-type="float" office:value="2.42" calcext:value-type="float">
            <text:p>2,42</text:p>
          </table:table-cell>
          <table:table-cell office:value-type="float" office:value="0.100979" calcext:value-type="float">
            <text:p>0,100979</text:p>
          </table:table-cell>
          <table:table-cell office:value-type="float" office:value="17.702645" calcext:value-type="float">
            <text:p>17,702645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0.093525" calcext:value-type="float">
            <text:p>0,093525</text:p>
          </table:table-cell>
          <table:table-cell office:value-type="float" office:value="16.743575" calcext:value-type="float">
            <text:p>16,743575</text:p>
          </table:table-cell>
        </table:table-row>
        <table:table-row table:style-name="ro1">
          <table:table-cell office:value-type="float" office:value="2.48" calcext:value-type="float">
            <text:p>2,48</text:p>
          </table:table-cell>
          <table:table-cell office:value-type="float" office:value="0.095717" calcext:value-type="float">
            <text:p>0,095717</text:p>
          </table:table-cell>
          <table:table-cell office:value-type="float" office:value="17.501887" calcext:value-type="float">
            <text:p>17,501887</text:p>
          </table:table-cell>
        </table:table-row>
        <table:table-row table:style-name="ro1">
          <table:table-cell office:value-type="float" office:value="2.51" calcext:value-type="float">
            <text:p>2,51</text:p>
          </table:table-cell>
          <table:table-cell office:value-type="float" office:value="0.095929" calcext:value-type="float">
            <text:p>0,095929</text:p>
          </table:table-cell>
          <table:table-cell office:value-type="float" office:value="17.963402" calcext:value-type="float">
            <text:p>17,963402</text:p>
          </table:table-cell>
        </table:table-row>
        <table:table-row table:style-name="ro1">
          <table:table-cell office:value-type="float" office:value="2.54" calcext:value-type="float">
            <text:p>2,54</text:p>
          </table:table-cell>
          <table:table-cell office:value-type="float" office:value="0.092391" calcext:value-type="float">
            <text:p>0,092391</text:p>
          </table:table-cell>
          <table:table-cell office:value-type="float" office:value="17.829833" calcext:value-type="float">
            <text:p>17,829833</text:p>
          </table:table-cell>
        </table:table-row>
        <table:table-row table:style-name="ro1">
          <table:table-cell office:value-type="float" office:value="2.57" calcext:value-type="float">
            <text:p>2,57</text:p>
          </table:table-cell>
          <table:table-cell office:value-type="float" office:value="0.086738" calcext:value-type="float">
            <text:p>0,086738</text:p>
          </table:table-cell>
          <table:table-cell office:value-type="float" office:value="19.267419" calcext:value-type="float">
            <text:p>19,267419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092918" calcext:value-type="float">
            <text:p>0,092918</text:p>
          </table:table-cell>
          <table:table-cell office:value-type="float" office:value="18.696734" calcext:value-type="float">
            <text:p>18,696734</text:p>
          </table:table-cell>
        </table:table-row>
        <table:table-row table:style-name="ro1">
          <table:table-cell office:value-type="float" office:value="2.63" calcext:value-type="float">
            <text:p>2,63</text:p>
          </table:table-cell>
          <table:table-cell office:value-type="float" office:value="0.087282" calcext:value-type="float">
            <text:p>0,087282</text:p>
          </table:table-cell>
          <table:table-cell office:value-type="float" office:value="18.083929" calcext:value-type="float">
            <text:p>18,083929</text:p>
          </table:table-cell>
        </table:table-row>
        <table:table-row table:style-name="ro1">
          <table:table-cell office:value-type="float" office:value="2.66" calcext:value-type="float">
            <text:p>2,66</text:p>
          </table:table-cell>
          <table:table-cell office:value-type="float" office:value="0.086878" calcext:value-type="float">
            <text:p>0,086878</text:p>
          </table:table-cell>
          <table:table-cell office:value-type="float" office:value="15.848046" calcext:value-type="float">
            <text:p>15,848046</text:p>
          </table:table-cell>
        </table:table-row>
        <table:table-row table:style-name="ro1">
          <table:table-cell office:value-type="float" office:value="2.69" calcext:value-type="float">
            <text:p>2,69</text:p>
          </table:table-cell>
          <table:table-cell office:value-type="float" office:value="0.089339" calcext:value-type="float">
            <text:p>0,089339</text:p>
          </table:table-cell>
          <table:table-cell office:value-type="float" office:value="19.181665" calcext:value-type="float">
            <text:p>19,181665</text:p>
          </table:table-cell>
        </table:table-row>
        <table:table-row table:style-name="ro1">
          <table:table-cell office:value-type="float" office:value="2.72" calcext:value-type="float">
            <text:p>2,72</text:p>
          </table:table-cell>
          <table:table-cell office:value-type="float" office:value="0.082997" calcext:value-type="float">
            <text:p>0,082997</text:p>
          </table:table-cell>
          <table:table-cell office:value-type="float" office:value="17.830113" calcext:value-type="float">
            <text:p>17,830113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0.089943" calcext:value-type="float">
            <text:p>0,089943</text:p>
          </table:table-cell>
          <table:table-cell office:value-type="float" office:value="16.857268" calcext:value-type="float">
            <text:p>16,857268</text:p>
          </table:table-cell>
        </table:table-row>
        <table:table-row table:style-name="ro1">
          <table:table-cell office:value-type="float" office:value="2.78" calcext:value-type="float">
            <text:p>2,78</text:p>
          </table:table-cell>
          <table:table-cell office:value-type="float" office:value="0.094475" calcext:value-type="float">
            <text:p>0,094475</text:p>
          </table:table-cell>
          <table:table-cell office:value-type="float" office:value="17.47326" calcext:value-type="float">
            <text:p>17,47326</text:p>
          </table:table-cell>
        </table:table-row>
        <table:table-row table:style-name="ro1">
          <table:table-cell office:value-type="float" office:value="2.81" calcext:value-type="float">
            <text:p>2,81</text:p>
          </table:table-cell>
          <table:table-cell office:value-type="float" office:value="0.086487" calcext:value-type="float">
            <text:p>0,086487</text:p>
          </table:table-cell>
          <table:table-cell office:value-type="float" office:value="17.940525" calcext:value-type="float">
            <text:p>17,940525</text:p>
          </table:table-cell>
        </table:table-row>
        <table:table-row table:style-name="ro1">
          <table:table-cell office:value-type="float" office:value="2.84" calcext:value-type="float">
            <text:p>2,84</text:p>
          </table:table-cell>
          <table:table-cell office:value-type="float" office:value="0.092687" calcext:value-type="float">
            <text:p>0,092687</text:p>
          </table:table-cell>
          <table:table-cell office:value-type="float" office:value="17.498862" calcext:value-type="float">
            <text:p>17,498862</text:p>
          </table:table-cell>
        </table:table-row>
        <table:table-row table:style-name="ro1">
          <table:table-cell office:value-type="float" office:value="2.87" calcext:value-type="float">
            <text:p>2,87</text:p>
          </table:table-cell>
          <table:table-cell office:value-type="float" office:value="0.090548" calcext:value-type="float">
            <text:p>0,090548</text:p>
          </table:table-cell>
          <table:table-cell office:value-type="float" office:value="17.345261" calcext:value-type="float">
            <text:p>17,345261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0.075715" calcext:value-type="float">
            <text:p>0,075715</text:p>
          </table:table-cell>
          <table:table-cell office:value-type="float" office:value="17.245689" calcext:value-type="float">
            <text:p>17,245689</text:p>
          </table:table-cell>
        </table:table-row>
        <table:table-row table:style-name="ro1">
          <table:table-cell office:value-type="float" office:value="2.93" calcext:value-type="float">
            <text:p>2,93</text:p>
          </table:table-cell>
          <table:table-cell office:value-type="float" office:value="0.087512" calcext:value-type="float">
            <text:p>0,087512</text:p>
          </table:table-cell>
          <table:table-cell office:value-type="float" office:value="16.470154" calcext:value-type="float">
            <text:p>16,470154</text:p>
          </table:table-cell>
        </table:table-row>
        <table:table-row table:style-name="ro1">
          <table:table-cell office:value-type="float" office:value="2.96" calcext:value-type="float">
            <text:p>2,96</text:p>
          </table:table-cell>
          <table:table-cell office:value-type="float" office:value="0.086362" calcext:value-type="float">
            <text:p>0,086362</text:p>
          </table:table-cell>
          <table:table-cell office:value-type="float" office:value="17.83945" calcext:value-type="float">
            <text:p>17,83945</text:p>
          </table:table-cell>
        </table:table-row>
        <table:table-row table:style-name="ro1">
          <table:table-cell office:value-type="float" office:value="2.99" calcext:value-type="float">
            <text:p>2,99</text:p>
          </table:table-cell>
          <table:table-cell office:value-type="float" office:value="0.086373" calcext:value-type="float">
            <text:p>0,086373</text:p>
          </table:table-cell>
          <table:table-cell office:value-type="float" office:value="17.376873" calcext:value-type="float">
            <text:p>17,376873</text:p>
          </table:table-cell>
        </table:table-row>
        <table:table-row table:style-name="ro1">
          <table:table-cell office:value-type="float" office:value="3.02" calcext:value-type="float">
            <text:p>3,02</text:p>
          </table:table-cell>
          <table:table-cell office:value-type="float" office:value="0.085064" calcext:value-type="float">
            <text:p>0,085064</text:p>
          </table:table-cell>
          <table:table-cell office:value-type="float" office:value="15.777253" calcext:value-type="float">
            <text:p>15,777253</text:p>
          </table:table-cell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0.070857" calcext:value-type="float">
            <text:p>0,070857</text:p>
          </table:table-cell>
          <table:table-cell office:value-type="float" office:value="17.153035" calcext:value-type="float">
            <text:p>17,153035</text:p>
          </table:table-cell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0.078399" calcext:value-type="float">
            <text:p>0,078399</text:p>
          </table:table-cell>
          <table:table-cell office:value-type="float" office:value="17.159535" calcext:value-type="float">
            <text:p>17,159535</text:p>
          </table:table-cell>
        </table:table-row>
        <table:table-row table:style-name="ro1">
          <table:table-cell office:value-type="float" office:value="3.11" calcext:value-type="float">
            <text:p>3,11</text:p>
          </table:table-cell>
          <table:table-cell office:value-type="float" office:value="0.072704" calcext:value-type="float">
            <text:p>0,072704</text:p>
          </table:table-cell>
          <table:table-cell office:value-type="float" office:value="16.954576" calcext:value-type="float">
            <text:p>16,954576</text:p>
          </table:table-cell>
        </table:table-row>
        <table:table-row table:style-name="ro1">
          <table:table-cell office:value-type="float" office:value="3.14" calcext:value-type="float">
            <text:p>3,14</text:p>
          </table:table-cell>
          <table:table-cell office:value-type="float" office:value="0.080397" calcext:value-type="float">
            <text:p>0,080397</text:p>
          </table:table-cell>
          <table:table-cell office:value-type="float" office:value="16.970729" calcext:value-type="float">
            <text:p>16,970729</text:p>
          </table:table-cell>
        </table:table-row>
        <table:table-row table:style-name="ro1">
          <table:table-cell office:value-type="float" office:value="3.17" calcext:value-type="float">
            <text:p>3,17</text:p>
          </table:table-cell>
          <table:table-cell office:value-type="float" office:value="0.079096" calcext:value-type="float">
            <text:p>0,079096</text:p>
          </table:table-cell>
          <table:table-cell office:value-type="float" office:value="15.696623" calcext:value-type="float">
            <text:p>15,696623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.07767" calcext:value-type="float">
            <text:p>0,07767</text:p>
          </table:table-cell>
          <table:table-cell office:value-type="float" office:value="15.72007" calcext:value-type="float">
            <text:p>15,72007</text:p>
          </table:table-cell>
        </table:table-row>
        <table:table-row table:style-name="ro1">
          <table:table-cell office:value-type="float" office:value="3.23" calcext:value-type="float">
            <text:p>3,23</text:p>
          </table:table-cell>
          <table:table-cell office:value-type="float" office:value="0.081329" calcext:value-type="float">
            <text:p>0,081329</text:p>
          </table:table-cell>
          <table:table-cell office:value-type="float" office:value="15.303117" calcext:value-type="float">
            <text:p>15,303117</text:p>
          </table:table-cell>
        </table:table-row>
        <table:table-row table:style-name="ro1">
          <table:table-cell office:value-type="float" office:value="3.26" calcext:value-type="float">
            <text:p>3,26</text:p>
          </table:table-cell>
          <table:table-cell office:value-type="float" office:value="0.067829" calcext:value-type="float">
            <text:p>0,067829</text:p>
          </table:table-cell>
          <table:table-cell office:value-type="float" office:value="16.083913" calcext:value-type="float">
            <text:p>16,083913</text:p>
          </table:table-cell>
        </table:table-row>
        <table:table-row table:style-name="ro1">
          <table:table-cell office:value-type="float" office:value="3.29" calcext:value-type="float">
            <text:p>3,29</text:p>
          </table:table-cell>
          <table:table-cell office:value-type="float" office:value="0.078061" calcext:value-type="float">
            <text:p>0,078061</text:p>
          </table:table-cell>
          <table:table-cell office:value-type="float" office:value="15.587867" calcext:value-type="float">
            <text:p>15,587867</text:p>
          </table:table-cell>
        </table:table-row>
        <table:table-row table:style-name="ro1">
          <table:table-cell office:value-type="float" office:value="3.32" calcext:value-type="float">
            <text:p>3,32</text:p>
          </table:table-cell>
          <table:table-cell office:value-type="float" office:value="0.071911" calcext:value-type="float">
            <text:p>0,071911</text:p>
          </table:table-cell>
          <table:table-cell office:value-type="float" office:value="15.300991" calcext:value-type="float">
            <text:p>15,300991</text:p>
          </table:table-cell>
        </table:table-row>
        <table:table-row table:style-name="ro1">
          <table:table-cell office:value-type="float" office:value="3.35" calcext:value-type="float">
            <text:p>3,35</text:p>
          </table:table-cell>
          <table:table-cell office:value-type="float" office:value="0.080005" calcext:value-type="float">
            <text:p>0,080005</text:p>
          </table:table-cell>
          <table:table-cell office:value-type="float" office:value="16.239933" calcext:value-type="float">
            <text:p>16,239933</text:p>
          </table:table-cell>
        </table:table-row>
        <table:table-row table:style-name="ro1">
          <table:table-cell office:value-type="float" office:value="3.38" calcext:value-type="float">
            <text:p>3,38</text:p>
          </table:table-cell>
          <table:table-cell office:value-type="float" office:value="0.071733" calcext:value-type="float">
            <text:p>0,071733</text:p>
          </table:table-cell>
          <table:table-cell office:value-type="float" office:value="14.297238" calcext:value-type="float">
            <text:p>14,297238</text:p>
          </table:table-cell>
        </table:table-row>
        <table:table-row table:style-name="ro1">
          <table:table-cell office:value-type="float" office:value="3.41" calcext:value-type="float">
            <text:p>3,41</text:p>
          </table:table-cell>
          <table:table-cell office:value-type="float" office:value="0.073383" calcext:value-type="float">
            <text:p>0,073383</text:p>
          </table:table-cell>
          <table:table-cell office:value-type="float" office:value="12.909879" calcext:value-type="float">
            <text:p>12,909879</text:p>
          </table:table-cell>
        </table:table-row>
        <table:table-row table:style-name="ro1">
          <table:table-cell office:value-type="float" office:value="3.44" calcext:value-type="float">
            <text:p>3,44</text:p>
          </table:table-cell>
          <table:table-cell office:value-type="float" office:value="0.073253" calcext:value-type="float">
            <text:p>0,073253</text:p>
          </table:table-cell>
          <table:table-cell office:value-type="float" office:value="14.395444" calcext:value-type="float">
            <text:p>14,395444</text:p>
          </table:table-cell>
        </table:table-row>
        <table:table-row table:style-name="ro1">
          <table:table-cell office:value-type="float" office:value="3.47" calcext:value-type="float">
            <text:p>3,47</text:p>
          </table:table-cell>
          <table:table-cell office:value-type="float" office:value="0.073285" calcext:value-type="float">
            <text:p>0,073285</text:p>
          </table:table-cell>
          <table:table-cell office:value-type="float" office:value="14.439391" calcext:value-type="float">
            <text:p>14,439391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0.069221" calcext:value-type="float">
            <text:p>0,069221</text:p>
          </table:table-cell>
          <table:table-cell office:value-type="float" office:value="13.378618" calcext:value-type="float">
            <text:p>13,378618</text:p>
          </table:table-cell>
        </table:table-row>
        <table:table-row table:style-name="ro1">
          <table:table-cell office:value-type="float" office:value="3.53" calcext:value-type="float">
            <text:p>3,53</text:p>
          </table:table-cell>
          <table:table-cell office:value-type="float" office:value="0.068977" calcext:value-type="float">
            <text:p>0,068977</text:p>
          </table:table-cell>
          <table:table-cell office:value-type="float" office:value="12.215124" calcext:value-type="float">
            <text:p>12,215124</text:p>
          </table:table-cell>
        </table:table-row>
        <table:table-row table:style-name="ro1">
          <table:table-cell office:value-type="float" office:value="3.56" calcext:value-type="float">
            <text:p>3,56</text:p>
          </table:table-cell>
          <table:table-cell office:value-type="float" office:value="0.071272" calcext:value-type="float">
            <text:p>0,071272</text:p>
          </table:table-cell>
          <table:table-cell office:value-type="float" office:value="13.531217" calcext:value-type="float">
            <text:p>13,531217</text:p>
          </table:table-cell>
        </table:table-row>
        <table:table-row table:style-name="ro1">
          <table:table-cell office:value-type="float" office:value="3.59" calcext:value-type="float">
            <text:p>3,59</text:p>
          </table:table-cell>
          <table:table-cell office:value-type="float" office:value="0.066626" calcext:value-type="float">
            <text:p>0,066626</text:p>
          </table:table-cell>
          <table:table-cell office:value-type="float" office:value="15.073362" calcext:value-type="float">
            <text:p>15,073362</text:p>
          </table:table-cell>
        </table:table-row>
        <table:table-row table:style-name="ro1">
          <table:table-cell office:value-type="float" office:value="3.62" calcext:value-type="float">
            <text:p>3,62</text:p>
          </table:table-cell>
          <table:table-cell office:value-type="float" office:value="0.070887" calcext:value-type="float">
            <text:p>0,070887</text:p>
          </table:table-cell>
          <table:table-cell office:value-type="float" office:value="12.736198" calcext:value-type="float">
            <text:p>12,736198</text:p>
          </table:table-cell>
        </table:table-row>
        <table:table-row table:style-name="ro1">
          <table:table-cell office:value-type="float" office:value="3.65" calcext:value-type="float">
            <text:p>3,65</text:p>
          </table:table-cell>
          <table:table-cell office:value-type="float" office:value="0.071271" calcext:value-type="float">
            <text:p>0,071271</text:p>
          </table:table-cell>
          <table:table-cell office:value-type="float" office:value="13.134346" calcext:value-type="float">
            <text:p>13,134346</text:p>
          </table:table-cell>
        </table:table-row>
        <table:table-row table:style-name="ro1">
          <table:table-cell office:value-type="float" office:value="3.68" calcext:value-type="float">
            <text:p>3,68</text:p>
          </table:table-cell>
          <table:table-cell office:value-type="float" office:value="0.071908" calcext:value-type="float">
            <text:p>0,071908</text:p>
          </table:table-cell>
          <table:table-cell office:value-type="float" office:value="12.822925" calcext:value-type="float">
            <text:p>12,822925</text:p>
          </table:table-cell>
        </table:table-row>
        <table:table-row table:style-name="ro1">
          <table:table-cell office:value-type="float" office:value="3.71" calcext:value-type="float">
            <text:p>3,71</text:p>
          </table:table-cell>
          <table:table-cell office:value-type="float" office:value="0.070423" calcext:value-type="float">
            <text:p>0,070423</text:p>
          </table:table-cell>
          <table:table-cell office:value-type="float" office:value="11.693923" calcext:value-type="float">
            <text:p>11,693923</text:p>
          </table:table-cell>
        </table:table-row>
        <table:table-row table:style-name="ro1">
          <table:table-cell office:value-type="float" office:value="3.74" calcext:value-type="float">
            <text:p>3,74</text:p>
          </table:table-cell>
          <table:table-cell office:value-type="float" office:value="0.068791" calcext:value-type="float">
            <text:p>0,068791</text:p>
          </table:table-cell>
          <table:table-cell office:value-type="float" office:value="16.708727" calcext:value-type="float">
            <text:p>16,708727</text:p>
          </table:table-cell>
        </table:table-row>
        <table:table-row table:style-name="ro1">
          <table:table-cell office:value-type="float" office:value="3.77" calcext:value-type="float">
            <text:p>3,77</text:p>
          </table:table-cell>
          <table:table-cell office:value-type="float" office:value="0.055" calcext:value-type="float">
            <text:p>0,055</text:p>
          </table:table-cell>
          <table:table-cell office:value-type="float" office:value="12.512167" calcext:value-type="float">
            <text:p>12,512167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0.069023" calcext:value-type="float">
            <text:p>0,069023</text:p>
          </table:table-cell>
          <table:table-cell office:value-type="float" office:value="12.302958" calcext:value-type="float">
            <text:p>12,302958</text:p>
          </table:table-cell>
        </table:table-row>
        <table:table-row table:style-name="ro1">
          <table:table-cell office:value-type="float" office:value="3.83" calcext:value-type="float">
            <text:p>3,83</text:p>
          </table:table-cell>
          <table:table-cell office:value-type="float" office:value="0.071171" calcext:value-type="float">
            <text:p>0,071171</text:p>
          </table:table-cell>
          <table:table-cell office:value-type="float" office:value="12.602257" calcext:value-type="float">
            <text:p>12,602257</text:p>
          </table:table-cell>
        </table:table-row>
        <table:table-row table:style-name="ro1">
          <table:table-cell office:value-type="float" office:value="3.86" calcext:value-type="float">
            <text:p>3,86</text:p>
          </table:table-cell>
          <table:table-cell office:value-type="float" office:value="0.061231" calcext:value-type="float">
            <text:p>0,061231</text:p>
          </table:table-cell>
          <table:table-cell office:value-type="float" office:value="10.930447" calcext:value-type="float">
            <text:p>10,930447</text:p>
          </table:table-cell>
        </table:table-row>
        <table:table-row table:style-name="ro1">
          <table:table-cell office:value-type="float" office:value="3.89" calcext:value-type="float">
            <text:p>3,89</text:p>
          </table:table-cell>
          <table:table-cell office:value-type="float" office:value="0.065066" calcext:value-type="float">
            <text:p>0,065066</text:p>
          </table:table-cell>
          <table:table-cell office:value-type="float" office:value="14.937885" calcext:value-type="float">
            <text:p>14,937885</text:p>
          </table:table-cell>
        </table:table-row>
        <table:table-row table:style-name="ro1">
          <table:table-cell office:value-type="float" office:value="3.92" calcext:value-type="float">
            <text:p>3,92</text:p>
          </table:table-cell>
          <table:table-cell office:value-type="float" office:value="0.058584" calcext:value-type="float">
            <text:p>0,058584</text:p>
          </table:table-cell>
          <table:table-cell office:value-type="float" office:value="11.876311" calcext:value-type="float">
            <text:p>11,876311</text:p>
          </table:table-cell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0.067624" calcext:value-type="float">
            <text:p>0,067624</text:p>
          </table:table-cell>
          <table:table-cell office:value-type="float" office:value="10.836543" calcext:value-type="float">
            <text:p>10,836543</text:p>
          </table:table-cell>
        </table:table-row>
        <table:table-row table:style-name="ro1">
          <table:table-cell office:value-type="float" office:value="3.98" calcext:value-type="float">
            <text:p>3,98</text:p>
          </table:table-cell>
          <table:table-cell office:value-type="float" office:value="0.056238" calcext:value-type="float">
            <text:p>0,056238</text:p>
          </table:table-cell>
          <table:table-cell office:value-type="float" office:value="11.1632" calcext:value-type="float">
            <text:p>11,1632</text:p>
          </table:table-cell>
        </table:table-row>
        <table:table-row table:style-name="ro1">
          <table:table-cell office:value-type="float" office:value="4.01" calcext:value-type="float">
            <text:p>4,01</text:p>
          </table:table-cell>
          <table:table-cell office:value-type="float" office:value="0.067701" calcext:value-type="float">
            <text:p>0,067701</text:p>
          </table:table-cell>
          <table:table-cell office:value-type="float" office:value="10.438196" calcext:value-type="float">
            <text:p>10,438196</text:p>
          </table:table-cell>
        </table:table-row>
        <table:table-row table:style-name="ro1">
          <table:table-cell office:value-type="float" office:value="4.04" calcext:value-type="float">
            <text:p>4,04</text:p>
          </table:table-cell>
          <table:table-cell office:value-type="float" office:value="0.06834" calcext:value-type="float">
            <text:p>0,06834</text:p>
          </table:table-cell>
          <table:table-cell office:value-type="float" office:value="10.78655" calcext:value-type="float">
            <text:p>10,78655</text:p>
          </table:table-cell>
        </table:table-row>
        <table:table-row table:style-name="ro1">
          <table:table-cell office:value-type="float" office:value="4.07" calcext:value-type="float">
            <text:p>4,07</text:p>
          </table:table-cell>
          <table:table-cell office:value-type="float" office:value="0.060946" calcext:value-type="float">
            <text:p>0,060946</text:p>
          </table:table-cell>
          <table:table-cell office:value-type="float" office:value="11.581972" calcext:value-type="float">
            <text:p>11,581972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0.062678" calcext:value-type="float">
            <text:p>0,062678</text:p>
          </table:table-cell>
          <table:table-cell office:value-type="float" office:value="10.712497" calcext:value-type="float">
            <text:p>10,712497</text:p>
          </table:table-cell>
        </table:table-row>
        <table:table-row table:style-name="ro1">
          <table:table-cell office:value-type="float" office:value="4.13" calcext:value-type="float">
            <text:p>4,13</text:p>
          </table:table-cell>
          <table:table-cell office:value-type="float" office:value="0.059769" calcext:value-type="float">
            <text:p>0,059769</text:p>
          </table:table-cell>
          <table:table-cell office:value-type="float" office:value="11.446629" calcext:value-type="float">
            <text:p>11,446629</text:p>
          </table:table-cell>
        </table:table-row>
        <table:table-row table:style-name="ro1">
          <table:table-cell office:value-type="float" office:value="4.16" calcext:value-type="float">
            <text:p>4,16</text:p>
          </table:table-cell>
          <table:table-cell office:value-type="float" office:value="0.073094" calcext:value-type="float">
            <text:p>0,073094</text:p>
          </table:table-cell>
          <table:table-cell office:value-type="float" office:value="14.083312" calcext:value-type="float">
            <text:p>14,083312</text:p>
          </table:table-cell>
        </table:table-row>
        <table:table-row table:style-name="ro1">
          <table:table-cell office:value-type="float" office:value="4.19" calcext:value-type="float">
            <text:p>4,19</text:p>
          </table:table-cell>
          <table:table-cell office:value-type="float" office:value="0.063255" calcext:value-type="float">
            <text:p>0,063255</text:p>
          </table:table-cell>
          <table:table-cell office:value-type="float" office:value="10.288457" calcext:value-type="float">
            <text:p>10,288457</text:p>
          </table:table-cell>
        </table:table-row>
        <table:table-row table:style-name="ro1">
          <table:table-cell office:value-type="float" office:value="4.22" calcext:value-type="float">
            <text:p>4,22</text:p>
          </table:table-cell>
          <table:table-cell office:value-type="float" office:value="0.060675" calcext:value-type="float">
            <text:p>0,060675</text:p>
          </table:table-cell>
          <table:table-cell office:value-type="float" office:value="9.825297" calcext:value-type="float">
            <text:p>9,825297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0.062181" calcext:value-type="float">
            <text:p>0,062181</text:p>
          </table:table-cell>
          <table:table-cell office:value-type="float" office:value="15.278491" calcext:value-type="float">
            <text:p>15,278491</text:p>
          </table:table-cell>
        </table:table-row>
        <table:table-row table:style-name="ro1">
          <table:table-cell office:value-type="float" office:value="4.28" calcext:value-type="float">
            <text:p>4,28</text:p>
          </table:table-cell>
          <table:table-cell office:value-type="float" office:value="0.058124" calcext:value-type="float">
            <text:p>0,058124</text:p>
          </table:table-cell>
          <table:table-cell office:value-type="float" office:value="9.30037" calcext:value-type="float">
            <text:p>9,30037</text:p>
          </table:table-cell>
        </table:table-row>
        <table:table-row table:style-name="ro1">
          <table:table-cell office:value-type="float" office:value="4.31" calcext:value-type="float">
            <text:p>4,31</text:p>
          </table:table-cell>
          <table:table-cell office:value-type="float" office:value="0.058658" calcext:value-type="float">
            <text:p>0,058658</text:p>
          </table:table-cell>
          <table:table-cell office:value-type="float" office:value="13.883796" calcext:value-type="float">
            <text:p>13,883796</text:p>
          </table:table-cell>
        </table:table-row>
        <table:table-row table:style-name="ro1">
          <table:table-cell office:value-type="float" office:value="4.34" calcext:value-type="float">
            <text:p>4,34</text:p>
          </table:table-cell>
          <table:table-cell office:value-type="float" office:value="0.056193" calcext:value-type="float">
            <text:p>0,056193</text:p>
          </table:table-cell>
          <table:table-cell office:value-type="float" office:value="11.794507" calcext:value-type="float">
            <text:p>11,794507</text:p>
          </table:table-cell>
        </table:table-row>
        <table:table-row table:style-name="ro1">
          <table:table-cell office:value-type="float" office:value="4.37" calcext:value-type="float">
            <text:p>4,37</text:p>
          </table:table-cell>
          <table:table-cell office:value-type="float" office:value="0.053697" calcext:value-type="float">
            <text:p>0,053697</text:p>
          </table:table-cell>
          <table:table-cell office:value-type="float" office:value="9.901717" calcext:value-type="float">
            <text:p>9,901717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0.058853" calcext:value-type="float">
            <text:p>0,058853</text:p>
          </table:table-cell>
          <table:table-cell office:value-type="float" office:value="9.441476" calcext:value-type="float">
            <text:p>9,441476</text:p>
          </table:table-cell>
        </table:table-row>
        <table:table-row table:style-name="ro1">
          <table:table-cell office:value-type="float" office:value="4.43" calcext:value-type="float">
            <text:p>4,43</text:p>
          </table:table-cell>
          <table:table-cell office:value-type="float" office:value="0.061644" calcext:value-type="float">
            <text:p>0,061644</text:p>
          </table:table-cell>
          <table:table-cell office:value-type="float" office:value="9.285034" calcext:value-type="float">
            <text:p>9,285034</text:p>
          </table:table-cell>
        </table:table-row>
        <table:table-row table:style-name="ro1">
          <table:table-cell office:value-type="float" office:value="4.46" calcext:value-type="float">
            <text:p>4,46</text:p>
          </table:table-cell>
          <table:table-cell office:value-type="float" office:value="0.061905" calcext:value-type="float">
            <text:p>0,061905</text:p>
          </table:table-cell>
          <table:table-cell office:value-type="float" office:value="13.21393" calcext:value-type="float">
            <text:p>13,21393</text:p>
          </table:table-cell>
        </table:table-row>
        <table:table-row table:style-name="ro1">
          <table:table-cell office:value-type="float" office:value="4.49" calcext:value-type="float">
            <text:p>4,49</text:p>
          </table:table-cell>
          <table:table-cell office:value-type="float" office:value="0.055577" calcext:value-type="float">
            <text:p>0,055577</text:p>
          </table:table-cell>
          <table:table-cell office:value-type="float" office:value="9.405894" calcext:value-type="float">
            <text:p>9,405894</text:p>
          </table:table-cell>
        </table:table-row>
        <table:table-row table:style-name="ro1">
          <table:table-cell office:value-type="float" office:value="4.52" calcext:value-type="float">
            <text:p>4,52</text:p>
          </table:table-cell>
          <table:table-cell office:value-type="float" office:value="0.053047" calcext:value-type="float">
            <text:p>0,053047</text:p>
          </table:table-cell>
          <table:table-cell office:value-type="float" office:value="10.598192" calcext:value-type="float">
            <text:p>10,598192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0.063512" calcext:value-type="float">
            <text:p>0,063512</text:p>
          </table:table-cell>
          <table:table-cell office:value-type="float" office:value="9.323252" calcext:value-type="float">
            <text:p>9,323252</text:p>
          </table:table-cell>
        </table:table-row>
        <table:table-row table:style-name="ro1">
          <table:table-cell office:value-type="float" office:value="4.58" calcext:value-type="float">
            <text:p>4,58</text:p>
          </table:table-cell>
          <table:table-cell office:value-type="float" office:value="0.052477" calcext:value-type="float">
            <text:p>0,052477</text:p>
          </table:table-cell>
          <table:table-cell office:value-type="float" office:value="11.067765" calcext:value-type="float">
            <text:p>11,067765</text:p>
          </table:table-cell>
        </table:table-row>
        <table:table-row table:style-name="ro1">
          <table:table-cell office:value-type="float" office:value="4.61" calcext:value-type="float">
            <text:p>4,61</text:p>
          </table:table-cell>
          <table:table-cell office:value-type="float" office:value="0.057823" calcext:value-type="float">
            <text:p>0,057823</text:p>
          </table:table-cell>
          <table:table-cell office:value-type="float" office:value="9.151099" calcext:value-type="float">
            <text:p>9,151099</text:p>
          </table:table-cell>
        </table:table-row>
        <table:table-row table:style-name="ro1">
          <table:table-cell office:value-type="float" office:value="4.64" calcext:value-type="float">
            <text:p>4,64</text:p>
          </table:table-cell>
          <table:table-cell office:value-type="float" office:value="0.059445" calcext:value-type="float">
            <text:p>0,059445</text:p>
          </table:table-cell>
          <table:table-cell office:value-type="float" office:value="8.55202" calcext:value-type="float">
            <text:p>8,55202</text:p>
          </table:table-cell>
        </table:table-row>
        <table:table-row table:style-name="ro1">
          <table:table-cell office:value-type="float" office:value="4.67" calcext:value-type="float">
            <text:p>4,67</text:p>
          </table:table-cell>
          <table:table-cell office:value-type="float" office:value="0.058464" calcext:value-type="float">
            <text:p>0,058464</text:p>
          </table:table-cell>
          <table:table-cell office:value-type="float" office:value="12.439794" calcext:value-type="float">
            <text:p>12,439794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0.063874" calcext:value-type="float">
            <text:p>0,063874</text:p>
          </table:table-cell>
          <table:table-cell office:value-type="float" office:value="8.188027" calcext:value-type="float">
            <text:p>8,188027</text:p>
          </table:table-cell>
        </table:table-row>
        <table:table-row table:style-name="ro1">
          <table:table-cell office:value-type="float" office:value="4.73" calcext:value-type="float">
            <text:p>4,73</text:p>
          </table:table-cell>
          <table:table-cell office:value-type="float" office:value="0.054495" calcext:value-type="float">
            <text:p>0,054495</text:p>
          </table:table-cell>
          <table:table-cell office:value-type="float" office:value="8.027142" calcext:value-type="float">
            <text:p>8,027142</text:p>
          </table:table-cell>
        </table:table-row>
        <table:table-row table:style-name="ro1">
          <table:table-cell office:value-type="float" office:value="4.76" calcext:value-type="float">
            <text:p>4,76</text:p>
          </table:table-cell>
          <table:table-cell office:value-type="float" office:value="0.062158" calcext:value-type="float">
            <text:p>0,062158</text:p>
          </table:table-cell>
          <table:table-cell office:value-type="float" office:value="8.646081" calcext:value-type="float">
            <text:p>8,646081</text:p>
          </table:table-cell>
        </table:table-row>
        <table:table-row table:style-name="ro1">
          <table:table-cell office:value-type="float" office:value="4.79" calcext:value-type="float">
            <text:p>4,79</text:p>
          </table:table-cell>
          <table:table-cell office:value-type="float" office:value="0.055591" calcext:value-type="float">
            <text:p>0,055591</text:p>
          </table:table-cell>
          <table:table-cell office:value-type="float" office:value="11.213628" calcext:value-type="float">
            <text:p>11,213628</text:p>
          </table:table-cell>
        </table:table-row>
        <table:table-row table:style-name="ro1">
          <table:table-cell office:value-type="float" office:value="4.82" calcext:value-type="float">
            <text:p>4,82</text:p>
          </table:table-cell>
          <table:table-cell office:value-type="float" office:value="0.059132" calcext:value-type="float">
            <text:p>0,059132</text:p>
          </table:table-cell>
          <table:table-cell office:value-type="float" office:value="7.656543" calcext:value-type="float">
            <text:p>7,656543</text:p>
          </table:table-cell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0.056355" calcext:value-type="float">
            <text:p>0,056355</text:p>
          </table:table-cell>
          <table:table-cell office:value-type="float" office:value="10.393417" calcext:value-type="float">
            <text:p>10,393417</text:p>
          </table:table-cell>
        </table:table-row>
        <table:table-row table:style-name="ro1">
          <table:table-cell office:value-type="float" office:value="4.88" calcext:value-type="float">
            <text:p>4,88</text:p>
          </table:table-cell>
          <table:table-cell office:value-type="float" office:value="0.051717" calcext:value-type="float">
            <text:p>0,051717</text:p>
          </table:table-cell>
          <table:table-cell office:value-type="float" office:value="10.138778" calcext:value-type="float">
            <text:p>10,138778</text:p>
          </table:table-cell>
        </table:table-row>
        <table:table-row table:style-name="ro1">
          <table:table-cell office:value-type="float" office:value="4.91" calcext:value-type="float">
            <text:p>4,91</text:p>
          </table:table-cell>
          <table:table-cell office:value-type="float" office:value="0.05421" calcext:value-type="float">
            <text:p>0,05421</text:p>
          </table:table-cell>
          <table:table-cell office:value-type="float" office:value="7.212292" calcext:value-type="float">
            <text:p>7,212292</text:p>
          </table:table-cell>
        </table:table-row>
        <table:table-row table:style-name="ro1">
          <table:table-cell office:value-type="float" office:value="4.94" calcext:value-type="float">
            <text:p>4,94</text:p>
          </table:table-cell>
          <table:table-cell office:value-type="float" office:value="0.052325" calcext:value-type="float">
            <text:p>0,052325</text:p>
          </table:table-cell>
          <table:table-cell office:value-type="float" office:value="9.707722" calcext:value-type="float">
            <text:p>9,707722</text:p>
          </table:table-cell>
        </table:table-row>
        <table:table-row table:style-name="ro1">
          <table:table-cell office:value-type="float" office:value="4.97" calcext:value-type="float">
            <text:p>4,97</text:p>
          </table:table-cell>
          <table:table-cell office:value-type="float" office:value="0.055198" calcext:value-type="float">
            <text:p>0,055198</text:p>
          </table:table-cell>
          <table:table-cell office:value-type="float" office:value="8.16425" calcext:value-type="float">
            <text:p>8,164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 style:data-style-name="N2" text:time-value="14:20:07.775059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6-19T14:31:00.853837500</dc:date>
    <meta:editing-duration>PT6M10S</meta:editing-duration>
    <meta:editing-cycles>2</meta:editing-cycles>
    <meta:generator>LibreOffice/25.8.7.3$Windows_X86_64 LibreOffice_project/30742500f2d3eb4366ac312fa33d3dcabdb3eba5</meta:generator>
    <meta:document-statistic meta:table-count="1" meta:cell-count="453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1.673cm" svg:y="0.315cm" chart:style-name="ch2">
          <text:p>RMSD_dist en fonction de k_attractivité2 avec k_attractivité1 = 1,34 et k_repulsion = 1,7</text:p>
        </chart:title>
        <chart:legend chart:legend-position="end" svg:x="12.917cm" svg:y="4.201cm" style:legend-expansion="high" chart:style-name="ch3"/>
        <chart:plot-area chart:style-name="ch4" svg:x="1.331cm" svg:y="1.778cm" svg:width="11.266cm" svg:height="6.061cm">
          <chart:coordinate-region svg:x="2.251cm" svg:y="1.977cm" svg:width="10.249cm" svg:height="5.215cm"/>
          <chart:axis chart:dimension="x" chart:name="primary-x" chart:style-name="ch5">
            <chart:title svg:x="5.857cm" svg:y="8.019cm" chart:style-name="ch2">
              <text:p><text:span text:style-name="T1">K_attractivité 2</text:span></text:p>
            </chart:title>
          </chart:axis>
          <chart:axis chart:dimension="y" chart:name="primary-y" chart:style-name="ch6">
            <chart:title svg:x="0.451cm" svg:y="5.668cm" chart:style-name="ch7">
              <text:p><text:span text:style-name="T1">RMSD_dist</text:span></text:p>
            </chart:title>
            <chart:grid chart:style-name="ch8" chart:class="major"/>
          </chart:axis>
          <chart:series chart:style-name="ch9" chart:values-cell-range-address="'Result_k_repulsion_1.700000_k_attraction1_0.500000'.B1:'Result_k_repulsion_1.700000_k_attraction1_0.500000'.B151" chart:label-cell-address="'Result_k_repulsion_1.700000_k_attraction1_0.500000'.B1:'Result_k_repulsion_1.700000_k_attraction1_0.500000'.B1" chart:class="chart:scatter">
            <chart:domain table:cell-range-address="'Result_k_repulsion_1.700000_k_attraction1_0.500000'.A2:'Result_k_repulsion_1.700000_k_attraction1_0.500000'.A151"/>
            <chart:data-point chart:repeated="1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MSD_dist</text:p>
                <draw:g>
                  <svg:desc>'Result_k_repulsion_1.700000_k_attraction1_0.500000'.B1:'Result_k_repulsion_1.700000_k_attraction1_0.5000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Result_k_repulsion_1.700000_k_attraction1_0.500000'.A2:'Result_k_repulsion_1.700000_k_attraction1_0.500000'.A151</svg:desc>
                </draw:g>
              </table:table-cell>
              <table:table-cell office:value-type="float" office:value="NaN">
                <text:p>NaN</text:p>
                <draw:g>
                  <svg:desc>'Result_k_repulsion_1.700000_k_attraction1_0.500000'.B1:'Result_k_repulsion_1.700000_k_attraction1_0.500000'.B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">
                <text:p>0.53</text:p>
              </table:table-cell>
              <table:table-cell office:value-type="float" office:value="0.192137">
                <text:p>0.192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">
                <text:p>0.56</text:p>
              </table:table-cell>
              <table:table-cell office:value-type="float" office:value="0.191789">
                <text:p>0.1917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">
                <text:p>0.59</text:p>
              </table:table-cell>
              <table:table-cell office:value-type="float" office:value="0.188389">
                <text:p>0.188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">
                <text:p>0.62</text:p>
              </table:table-cell>
              <table:table-cell office:value-type="float" office:value="0.182165">
                <text:p>0.182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0.17538">
                <text:p>0.17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">
                <text:p>0.68</text:p>
              </table:table-cell>
              <table:table-cell office:value-type="float" office:value="0.170976">
                <text:p>0.170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">
                <text:p>0.71</text:p>
              </table:table-cell>
              <table:table-cell office:value-type="float" office:value="0.173671">
                <text:p>0.1736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">
                <text:p>0.74</text:p>
              </table:table-cell>
              <table:table-cell office:value-type="float" office:value="0.158752">
                <text:p>0.158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">
                <text:p>0.77</text:p>
              </table:table-cell>
              <table:table-cell office:value-type="float" office:value="0.166043">
                <text:p>0.166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0.157015">
                <text:p>0.157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">
                <text:p>0.83</text:p>
              </table:table-cell>
              <table:table-cell office:value-type="float" office:value="0.1571">
                <text:p>0.1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">
                <text:p>0.86</text:p>
              </table:table-cell>
              <table:table-cell office:value-type="float" office:value="0.157206">
                <text:p>0.1572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">
                <text:p>0.89</text:p>
              </table:table-cell>
              <table:table-cell office:value-type="float" office:value="0.151349">
                <text:p>0.1513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">
                <text:p>0.92</text:p>
              </table:table-cell>
              <table:table-cell office:value-type="float" office:value="0.147847">
                <text:p>0.1478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">
                <text:p>0.95</text:p>
              </table:table-cell>
              <table:table-cell office:value-type="float" office:value="0.151246">
                <text:p>0.151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">
                <text:p>0.98</text:p>
              </table:table-cell>
              <table:table-cell office:value-type="float" office:value="0.141622">
                <text:p>0.1416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">
                <text:p>1.01</text:p>
              </table:table-cell>
              <table:table-cell office:value-type="float" office:value="0.144335">
                <text:p>0.1443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4">
                <text:p>1.04</text:p>
              </table:table-cell>
              <table:table-cell office:value-type="float" office:value="0.143366">
                <text:p>0.143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">
                <text:p>1.07</text:p>
              </table:table-cell>
              <table:table-cell office:value-type="float" office:value="0.141579">
                <text:p>0.1415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">
                <text:p>1.1</text:p>
              </table:table-cell>
              <table:table-cell office:value-type="float" office:value="0.138408">
                <text:p>0.1384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3">
                <text:p>1.13</text:p>
              </table:table-cell>
              <table:table-cell office:value-type="float" office:value="0.137881">
                <text:p>0.1378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6">
                <text:p>1.16</text:p>
              </table:table-cell>
              <table:table-cell office:value-type="float" office:value="0.132371">
                <text:p>0.1323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9">
                <text:p>1.19</text:p>
              </table:table-cell>
              <table:table-cell office:value-type="float" office:value="0.129023">
                <text:p>0.1290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2">
                <text:p>1.22</text:p>
              </table:table-cell>
              <table:table-cell office:value-type="float" office:value="0.124488">
                <text:p>0.124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136604">
                <text:p>0.1366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8">
                <text:p>1.28</text:p>
              </table:table-cell>
              <table:table-cell office:value-type="float" office:value="0.131941">
                <text:p>0.131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1">
                <text:p>1.31</text:p>
              </table:table-cell>
              <table:table-cell office:value-type="float" office:value="0.123668">
                <text:p>0.1236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4">
                <text:p>1.34</text:p>
              </table:table-cell>
              <table:table-cell office:value-type="float" office:value="0.129132">
                <text:p>0.129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7">
                <text:p>1.37</text:p>
              </table:table-cell>
              <table:table-cell office:value-type="float" office:value="0.1209">
                <text:p>0.12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">
                <text:p>1.4</text:p>
              </table:table-cell>
              <table:table-cell office:value-type="float" office:value="0.125481">
                <text:p>0.1254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3">
                <text:p>1.43</text:p>
              </table:table-cell>
              <table:table-cell office:value-type="float" office:value="0.12485">
                <text:p>0.124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6">
                <text:p>1.46</text:p>
              </table:table-cell>
              <table:table-cell office:value-type="float" office:value="0.119196">
                <text:p>0.1191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9">
                <text:p>1.49</text:p>
              </table:table-cell>
              <table:table-cell office:value-type="float" office:value="0.123811">
                <text:p>0.1238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2">
                <text:p>1.52</text:p>
              </table:table-cell>
              <table:table-cell office:value-type="float" office:value="0.122583">
                <text:p>0.1225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5">
                <text:p>1.55</text:p>
              </table:table-cell>
              <table:table-cell office:value-type="float" office:value="0.113835">
                <text:p>0.1138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8">
                <text:p>1.58</text:p>
              </table:table-cell>
              <table:table-cell office:value-type="float" office:value="0.107492">
                <text:p>0.1074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1">
                <text:p>1.61</text:p>
              </table:table-cell>
              <table:table-cell office:value-type="float" office:value="0.11065">
                <text:p>0.110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4">
                <text:p>1.64</text:p>
              </table:table-cell>
              <table:table-cell office:value-type="float" office:value="0.118038">
                <text:p>0.1180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7">
                <text:p>1.67</text:p>
              </table:table-cell>
              <table:table-cell office:value-type="float" office:value="0.117012">
                <text:p>0.1170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">
                <text:p>1.7</text:p>
              </table:table-cell>
              <table:table-cell office:value-type="float" office:value="0.115139">
                <text:p>0.1151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3">
                <text:p>1.73</text:p>
              </table:table-cell>
              <table:table-cell office:value-type="float" office:value="0.106325">
                <text:p>0.1063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6">
                <text:p>1.76</text:p>
              </table:table-cell>
              <table:table-cell office:value-type="float" office:value="0.112235">
                <text:p>0.1122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9">
                <text:p>1.79</text:p>
              </table:table-cell>
              <table:table-cell office:value-type="float" office:value="0.10726">
                <text:p>0.107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2">
                <text:p>1.82</text:p>
              </table:table-cell>
              <table:table-cell office:value-type="float" office:value="0.105897">
                <text:p>0.1058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5">
                <text:p>1.85</text:p>
              </table:table-cell>
              <table:table-cell office:value-type="float" office:value="0.100845">
                <text:p>0.1008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8">
                <text:p>1.88</text:p>
              </table:table-cell>
              <table:table-cell office:value-type="float" office:value="0.114879">
                <text:p>0.1148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1">
                <text:p>1.91</text:p>
              </table:table-cell>
              <table:table-cell office:value-type="float" office:value="0.107669">
                <text:p>0.1076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4">
                <text:p>1.94</text:p>
              </table:table-cell>
              <table:table-cell office:value-type="float" office:value="0.100777">
                <text:p>0.1007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7">
                <text:p>1.97</text:p>
              </table:table-cell>
              <table:table-cell office:value-type="float" office:value="0.102437">
                <text:p>0.1024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103035">
                <text:p>0.1030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3">
                <text:p>2.03</text:p>
              </table:table-cell>
              <table:table-cell office:value-type="float" office:value="0.104549">
                <text:p>0.1045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6">
                <text:p>2.06</text:p>
              </table:table-cell>
              <table:table-cell office:value-type="float" office:value="0.09693">
                <text:p>0.096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09">
                <text:p>2.09</text:p>
              </table:table-cell>
              <table:table-cell office:value-type="float" office:value="0.103983">
                <text:p>0.1039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2">
                <text:p>2.12</text:p>
              </table:table-cell>
              <table:table-cell office:value-type="float" office:value="0.102303">
                <text:p>0.1023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5">
                <text:p>2.15</text:p>
              </table:table-cell>
              <table:table-cell office:value-type="float" office:value="0.097701">
                <text:p>0.0977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8">
                <text:p>2.18</text:p>
              </table:table-cell>
              <table:table-cell office:value-type="float" office:value="0.098578">
                <text:p>0.0985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1">
                <text:p>2.21</text:p>
              </table:table-cell>
              <table:table-cell office:value-type="float" office:value="0.097456">
                <text:p>0.0974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4">
                <text:p>2.24</text:p>
              </table:table-cell>
              <table:table-cell office:value-type="float" office:value="0.096966">
                <text:p>0.0969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27">
                <text:p>2.27</text:p>
              </table:table-cell>
              <table:table-cell office:value-type="float" office:value="0.097046">
                <text:p>0.0970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3">
                <text:p>2.3</text:p>
              </table:table-cell>
              <table:table-cell office:value-type="float" office:value="0.092109">
                <text:p>0.0921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3">
                <text:p>2.33</text:p>
              </table:table-cell>
              <table:table-cell office:value-type="float" office:value="0.086104">
                <text:p>0.0861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6">
                <text:p>2.36</text:p>
              </table:table-cell>
              <table:table-cell office:value-type="float" office:value="0.096735">
                <text:p>0.0967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9">
                <text:p>2.39</text:p>
              </table:table-cell>
              <table:table-cell office:value-type="float" office:value="0.098843">
                <text:p>0.0988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42">
                <text:p>2.42</text:p>
              </table:table-cell>
              <table:table-cell office:value-type="float" office:value="0.10179">
                <text:p>0.101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45">
                <text:p>2.45</text:p>
              </table:table-cell>
              <table:table-cell office:value-type="float" office:value="0.100979">
                <text:p>0.1009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48">
                <text:p>2.48</text:p>
              </table:table-cell>
              <table:table-cell office:value-type="float" office:value="0.093525">
                <text:p>0.0935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51">
                <text:p>2.51</text:p>
              </table:table-cell>
              <table:table-cell office:value-type="float" office:value="0.095717">
                <text:p>0.0957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54">
                <text:p>2.54</text:p>
              </table:table-cell>
              <table:table-cell office:value-type="float" office:value="0.095929">
                <text:p>0.0959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7">
                <text:p>2.57</text:p>
              </table:table-cell>
              <table:table-cell office:value-type="float" office:value="0.092391">
                <text:p>0.0923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">
                <text:p>2.6</text:p>
              </table:table-cell>
              <table:table-cell office:value-type="float" office:value="0.086738">
                <text:p>0.0867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3">
                <text:p>2.63</text:p>
              </table:table-cell>
              <table:table-cell office:value-type="float" office:value="0.092918">
                <text:p>0.0929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6">
                <text:p>2.66</text:p>
              </table:table-cell>
              <table:table-cell office:value-type="float" office:value="0.087282">
                <text:p>0.0872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9">
                <text:p>2.69</text:p>
              </table:table-cell>
              <table:table-cell office:value-type="float" office:value="0.086878">
                <text:p>0.0868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72">
                <text:p>2.72</text:p>
              </table:table-cell>
              <table:table-cell office:value-type="float" office:value="0.089339">
                <text:p>0.0893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5">
                <text:p>2.75</text:p>
              </table:table-cell>
              <table:table-cell office:value-type="float" office:value="0.082997">
                <text:p>0.0829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78">
                <text:p>2.78</text:p>
              </table:table-cell>
              <table:table-cell office:value-type="float" office:value="0.089943">
                <text:p>0.0899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1">
                <text:p>2.81</text:p>
              </table:table-cell>
              <table:table-cell office:value-type="float" office:value="0.094475">
                <text:p>0.0944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4">
                <text:p>2.84</text:p>
              </table:table-cell>
              <table:table-cell office:value-type="float" office:value="0.086487">
                <text:p>0.0864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7">
                <text:p>2.87</text:p>
              </table:table-cell>
              <table:table-cell office:value-type="float" office:value="0.092687">
                <text:p>0.0926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">
                <text:p>2.9</text:p>
              </table:table-cell>
              <table:table-cell office:value-type="float" office:value="0.090548">
                <text:p>0.0905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93">
                <text:p>2.93</text:p>
              </table:table-cell>
              <table:table-cell office:value-type="float" office:value="0.075715">
                <text:p>0.0757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96">
                <text:p>2.96</text:p>
              </table:table-cell>
              <table:table-cell office:value-type="float" office:value="0.087512">
                <text:p>0.0875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99">
                <text:p>2.99</text:p>
              </table:table-cell>
              <table:table-cell office:value-type="float" office:value="0.086362">
                <text:p>0.0863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02">
                <text:p>3.02</text:p>
              </table:table-cell>
              <table:table-cell office:value-type="float" office:value="0.086373">
                <text:p>0.0863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05">
                <text:p>3.05</text:p>
              </table:table-cell>
              <table:table-cell office:value-type="float" office:value="0.085064">
                <text:p>0.0850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08">
                <text:p>3.08</text:p>
              </table:table-cell>
              <table:table-cell office:value-type="float" office:value="0.070857">
                <text:p>0.0708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11">
                <text:p>3.11</text:p>
              </table:table-cell>
              <table:table-cell office:value-type="float" office:value="0.078399">
                <text:p>0.0783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14">
                <text:p>3.14</text:p>
              </table:table-cell>
              <table:table-cell office:value-type="float" office:value="0.072704">
                <text:p>0.0727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17">
                <text:p>3.17</text:p>
              </table:table-cell>
              <table:table-cell office:value-type="float" office:value="0.080397">
                <text:p>0.0803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2">
                <text:p>3.2</text:p>
              </table:table-cell>
              <table:table-cell office:value-type="float" office:value="0.079096">
                <text:p>0.0790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23">
                <text:p>3.23</text:p>
              </table:table-cell>
              <table:table-cell office:value-type="float" office:value="0.07767">
                <text:p>0.077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26">
                <text:p>3.26</text:p>
              </table:table-cell>
              <table:table-cell office:value-type="float" office:value="0.081329">
                <text:p>0.0813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29">
                <text:p>3.29</text:p>
              </table:table-cell>
              <table:table-cell office:value-type="float" office:value="0.067829">
                <text:p>0.0678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32">
                <text:p>3.32</text:p>
              </table:table-cell>
              <table:table-cell office:value-type="float" office:value="0.078061">
                <text:p>0.0780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35">
                <text:p>3.35</text:p>
              </table:table-cell>
              <table:table-cell office:value-type="float" office:value="0.071911">
                <text:p>0.0719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38">
                <text:p>3.38</text:p>
              </table:table-cell>
              <table:table-cell office:value-type="float" office:value="0.080005">
                <text:p>0.0800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41">
                <text:p>3.41</text:p>
              </table:table-cell>
              <table:table-cell office:value-type="float" office:value="0.071733">
                <text:p>0.0717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44">
                <text:p>3.44</text:p>
              </table:table-cell>
              <table:table-cell office:value-type="float" office:value="0.073383">
                <text:p>0.0733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47">
                <text:p>3.47</text:p>
              </table:table-cell>
              <table:table-cell office:value-type="float" office:value="0.073253">
                <text:p>0.0732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5">
                <text:p>3.5</text:p>
              </table:table-cell>
              <table:table-cell office:value-type="float" office:value="0.073285">
                <text:p>0.0732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53">
                <text:p>3.53</text:p>
              </table:table-cell>
              <table:table-cell office:value-type="float" office:value="0.069221">
                <text:p>0.0692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56">
                <text:p>3.56</text:p>
              </table:table-cell>
              <table:table-cell office:value-type="float" office:value="0.068977">
                <text:p>0.0689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59">
                <text:p>3.59</text:p>
              </table:table-cell>
              <table:table-cell office:value-type="float" office:value="0.071272">
                <text:p>0.0712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62">
                <text:p>3.62</text:p>
              </table:table-cell>
              <table:table-cell office:value-type="float" office:value="0.066626">
                <text:p>0.0666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65">
                <text:p>3.65</text:p>
              </table:table-cell>
              <table:table-cell office:value-type="float" office:value="0.070887">
                <text:p>0.0708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68">
                <text:p>3.68</text:p>
              </table:table-cell>
              <table:table-cell office:value-type="float" office:value="0.071271">
                <text:p>0.0712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71">
                <text:p>3.71</text:p>
              </table:table-cell>
              <table:table-cell office:value-type="float" office:value="0.071908">
                <text:p>0.0719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74">
                <text:p>3.74</text:p>
              </table:table-cell>
              <table:table-cell office:value-type="float" office:value="0.070423">
                <text:p>0.0704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77">
                <text:p>3.77</text:p>
              </table:table-cell>
              <table:table-cell office:value-type="float" office:value="0.068791">
                <text:p>0.0687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8">
                <text:p>3.8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83">
                <text:p>3.83</text:p>
              </table:table-cell>
              <table:table-cell office:value-type="float" office:value="0.069023">
                <text:p>0.0690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86">
                <text:p>3.86</text:p>
              </table:table-cell>
              <table:table-cell office:value-type="float" office:value="0.071171">
                <text:p>0.0711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89">
                <text:p>3.89</text:p>
              </table:table-cell>
              <table:table-cell office:value-type="float" office:value="0.061231">
                <text:p>0.0612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92">
                <text:p>3.92</text:p>
              </table:table-cell>
              <table:table-cell office:value-type="float" office:value="0.065066">
                <text:p>0.0650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95">
                <text:p>3.95</text:p>
              </table:table-cell>
              <table:table-cell office:value-type="float" office:value="0.058584">
                <text:p>0.0585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98">
                <text:p>3.98</text:p>
              </table:table-cell>
              <table:table-cell office:value-type="float" office:value="0.067624">
                <text:p>0.0676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01">
                <text:p>4.01</text:p>
              </table:table-cell>
              <table:table-cell office:value-type="float" office:value="0.056238">
                <text:p>0.0562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04">
                <text:p>4.04</text:p>
              </table:table-cell>
              <table:table-cell office:value-type="float" office:value="0.067701">
                <text:p>0.0677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07">
                <text:p>4.07</text:p>
              </table:table-cell>
              <table:table-cell office:value-type="float" office:value="0.06834">
                <text:p>0.068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1">
                <text:p>4.1</text:p>
              </table:table-cell>
              <table:table-cell office:value-type="float" office:value="0.060946">
                <text:p>0.0609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13">
                <text:p>4.13</text:p>
              </table:table-cell>
              <table:table-cell office:value-type="float" office:value="0.062678">
                <text:p>0.0626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16">
                <text:p>4.16</text:p>
              </table:table-cell>
              <table:table-cell office:value-type="float" office:value="0.059769">
                <text:p>0.0597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9">
                <text:p>4.19</text:p>
              </table:table-cell>
              <table:table-cell office:value-type="float" office:value="0.073094">
                <text:p>0.0730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22">
                <text:p>4.22</text:p>
              </table:table-cell>
              <table:table-cell office:value-type="float" office:value="0.063255">
                <text:p>0.0632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25">
                <text:p>4.25</text:p>
              </table:table-cell>
              <table:table-cell office:value-type="float" office:value="0.060675">
                <text:p>0.0606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28">
                <text:p>4.28</text:p>
              </table:table-cell>
              <table:table-cell office:value-type="float" office:value="0.062181">
                <text:p>0.0621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31">
                <text:p>4.31</text:p>
              </table:table-cell>
              <table:table-cell office:value-type="float" office:value="0.058124">
                <text:p>0.0581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34">
                <text:p>4.34</text:p>
              </table:table-cell>
              <table:table-cell office:value-type="float" office:value="0.058658">
                <text:p>0.0586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37">
                <text:p>4.37</text:p>
              </table:table-cell>
              <table:table-cell office:value-type="float" office:value="0.056193">
                <text:p>0.0561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4">
                <text:p>4.4</text:p>
              </table:table-cell>
              <table:table-cell office:value-type="float" office:value="0.053697">
                <text:p>0.0536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43">
                <text:p>4.43</text:p>
              </table:table-cell>
              <table:table-cell office:value-type="float" office:value="0.058853">
                <text:p>0.0588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6">
                <text:p>4.46</text:p>
              </table:table-cell>
              <table:table-cell office:value-type="float" office:value="0.061644">
                <text:p>0.0616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49">
                <text:p>4.49</text:p>
              </table:table-cell>
              <table:table-cell office:value-type="float" office:value="0.061905">
                <text:p>0.0619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52">
                <text:p>4.52</text:p>
              </table:table-cell>
              <table:table-cell office:value-type="float" office:value="0.055577">
                <text:p>0.0555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55">
                <text:p>4.55</text:p>
              </table:table-cell>
              <table:table-cell office:value-type="float" office:value="0.053047">
                <text:p>0.0530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58">
                <text:p>4.58</text:p>
              </table:table-cell>
              <table:table-cell office:value-type="float" office:value="0.063512">
                <text:p>0.0635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61">
                <text:p>4.61</text:p>
              </table:table-cell>
              <table:table-cell office:value-type="float" office:value="0.052477">
                <text:p>0.0524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4">
                <text:p>4.64</text:p>
              </table:table-cell>
              <table:table-cell office:value-type="float" office:value="0.057823">
                <text:p>0.0578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7">
                <text:p>4.67</text:p>
              </table:table-cell>
              <table:table-cell office:value-type="float" office:value="0.059445">
                <text:p>0.0594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7">
                <text:p>4.7</text:p>
              </table:table-cell>
              <table:table-cell office:value-type="float" office:value="0.058464">
                <text:p>0.0584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73">
                <text:p>4.73</text:p>
              </table:table-cell>
              <table:table-cell office:value-type="float" office:value="0.063874">
                <text:p>0.0638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76">
                <text:p>4.76</text:p>
              </table:table-cell>
              <table:table-cell office:value-type="float" office:value="0.054495">
                <text:p>0.0544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79">
                <text:p>4.79</text:p>
              </table:table-cell>
              <table:table-cell office:value-type="float" office:value="0.062158">
                <text:p>0.0621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82">
                <text:p>4.82</text:p>
              </table:table-cell>
              <table:table-cell office:value-type="float" office:value="0.055591">
                <text:p>0.0555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85">
                <text:p>4.85</text:p>
              </table:table-cell>
              <table:table-cell office:value-type="float" office:value="0.059132">
                <text:p>0.0591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88">
                <text:p>4.88</text:p>
              </table:table-cell>
              <table:table-cell office:value-type="float" office:value="0.056355">
                <text:p>0.0563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91">
                <text:p>4.91</text:p>
              </table:table-cell>
              <table:table-cell office:value-type="float" office:value="0.051717">
                <text:p>0.0517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4">
                <text:p>4.94</text:p>
              </table:table-cell>
              <table:table-cell office:value-type="float" office:value="0.05421">
                <text:p>0.054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97">
                <text:p>4.97</text:p>
              </table:table-cell>
              <table:table-cell office:value-type="float" office:value="0.052325">
                <text:p>0.0523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0.055198">
                <text:p>0.055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7.3$Windows_X86_64 LibreOffice_project/30742500f2d3eb4366ac312fa33d3dcabdb3eba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667cm" svg:y="0.315cm" chart:style-name="ch2">
          <text:p>RMSD_angle en fonction de k_attractivité2 avec k_attractivité1 = 1,34 et k_repulsion = 1,7</text:p>
        </chart:title>
        <chart:legend chart:legend-position="end" svg:x="12.61cm" svg:y="4.201cm" style:legend-expansion="high" chart:style-name="ch3"/>
        <chart:plot-area chart:style-name="ch4" svg:x="0.32cm" svg:y="1.778cm" svg:width="11.97cm" svg:height="7.042cm">
          <chart:coordinate-region svg:x="0.954cm" svg:y="1.977cm" svg:width="11.239cm" svg:height="6.19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_k_repulsion_1.700000_k_attraction1_0.500000'.C1:'Result_k_repulsion_1.700000_k_attraction1_0.500000'.C151" chart:label-cell-address="'Result_k_repulsion_1.700000_k_attraction1_0.500000'.C1:'Result_k_repulsion_1.700000_k_attraction1_0.500000'.C1" chart:class="chart:scatter">
            <chart:domain table:cell-range-address="'Result_k_repulsion_1.700000_k_attraction1_0.500000'.A2:'Result_k_repulsion_1.700000_k_attraction1_0.500000'.A151"/>
            <chart:data-point chart:repeated="1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MSD_angle</text:p>
                <draw:g>
                  <svg:desc>'Result_k_repulsion_1.700000_k_attraction1_0.500000'.C1:'Result_k_repulsion_1.700000_k_attraction1_0.5000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Result_k_repulsion_1.700000_k_attraction1_0.500000'.A2:'Result_k_repulsion_1.700000_k_attraction1_0.500000'.A151</svg:desc>
                </draw:g>
              </table:table-cell>
              <table:table-cell office:value-type="float" office:value="NaN">
                <text:p>NaN</text:p>
                <draw:g>
                  <svg:desc>'Result_k_repulsion_1.700000_k_attraction1_0.500000'.C1:'Result_k_repulsion_1.700000_k_attraction1_0.500000'.C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">
                <text:p>0.53</text:p>
              </table:table-cell>
              <table:table-cell office:value-type="float" office:value="26.658165">
                <text:p>26.658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">
                <text:p>0.56</text:p>
              </table:table-cell>
              <table:table-cell office:value-type="float" office:value="26.040041">
                <text:p>26.040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">
                <text:p>0.59</text:p>
              </table:table-cell>
              <table:table-cell office:value-type="float" office:value="25.391061">
                <text:p>25.391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">
                <text:p>0.62</text:p>
              </table:table-cell>
              <table:table-cell office:value-type="float" office:value="25.374517">
                <text:p>25.374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24.718861">
                <text:p>24.718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">
                <text:p>0.68</text:p>
              </table:table-cell>
              <table:table-cell office:value-type="float" office:value="24.451829">
                <text:p>24.4518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">
                <text:p>0.71</text:p>
              </table:table-cell>
              <table:table-cell office:value-type="float" office:value="24.02558">
                <text:p>24.025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">
                <text:p>0.74</text:p>
              </table:table-cell>
              <table:table-cell office:value-type="float" office:value="23.935385">
                <text:p>23.935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">
                <text:p>0.77</text:p>
              </table:table-cell>
              <table:table-cell office:value-type="float" office:value="23.554099">
                <text:p>23.5540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23.116815">
                <text:p>23.116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">
                <text:p>0.83</text:p>
              </table:table-cell>
              <table:table-cell office:value-type="float" office:value="23.09336">
                <text:p>23.09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">
                <text:p>0.86</text:p>
              </table:table-cell>
              <table:table-cell office:value-type="float" office:value="22.632391">
                <text:p>22.632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">
                <text:p>0.89</text:p>
              </table:table-cell>
              <table:table-cell office:value-type="float" office:value="22.830986">
                <text:p>22.830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">
                <text:p>0.92</text:p>
              </table:table-cell>
              <table:table-cell office:value-type="float" office:value="22.659801">
                <text:p>22.6598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">
                <text:p>0.95</text:p>
              </table:table-cell>
              <table:table-cell office:value-type="float" office:value="22.18374">
                <text:p>22.183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">
                <text:p>0.98</text:p>
              </table:table-cell>
              <table:table-cell office:value-type="float" office:value="22.09799">
                <text:p>22.09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">
                <text:p>1.01</text:p>
              </table:table-cell>
              <table:table-cell office:value-type="float" office:value="21.743557">
                <text:p>21.7435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4">
                <text:p>1.04</text:p>
              </table:table-cell>
              <table:table-cell office:value-type="float" office:value="21.613302">
                <text:p>21.6133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">
                <text:p>1.07</text:p>
              </table:table-cell>
              <table:table-cell office:value-type="float" office:value="21.550269">
                <text:p>21.5502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">
                <text:p>1.1</text:p>
              </table:table-cell>
              <table:table-cell office:value-type="float" office:value="21.395175">
                <text:p>21.395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3">
                <text:p>1.13</text:p>
              </table:table-cell>
              <table:table-cell office:value-type="float" office:value="21.351399">
                <text:p>21.351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6">
                <text:p>1.16</text:p>
              </table:table-cell>
              <table:table-cell office:value-type="float" office:value="21.256487">
                <text:p>21.2564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9">
                <text:p>1.19</text:p>
              </table:table-cell>
              <table:table-cell office:value-type="float" office:value="21.192409">
                <text:p>21.1924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2">
                <text:p>1.22</text:p>
              </table:table-cell>
              <table:table-cell office:value-type="float" office:value="21.099486">
                <text:p>21.0994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19.880859">
                <text:p>19.8808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8">
                <text:p>1.28</text:p>
              </table:table-cell>
              <table:table-cell office:value-type="float" office:value="20.633689">
                <text:p>20.633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1">
                <text:p>1.31</text:p>
              </table:table-cell>
              <table:table-cell office:value-type="float" office:value="21.064528">
                <text:p>21.064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4">
                <text:p>1.34</text:p>
              </table:table-cell>
              <table:table-cell office:value-type="float" office:value="20.542146">
                <text:p>20.542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7">
                <text:p>1.37</text:p>
              </table:table-cell>
              <table:table-cell office:value-type="float" office:value="20.341438">
                <text:p>20.3414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">
                <text:p>1.4</text:p>
              </table:table-cell>
              <table:table-cell office:value-type="float" office:value="20.413838">
                <text:p>20.4138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3">
                <text:p>1.43</text:p>
              </table:table-cell>
              <table:table-cell office:value-type="float" office:value="20.262824">
                <text:p>20.2628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6">
                <text:p>1.46</text:p>
              </table:table-cell>
              <table:table-cell office:value-type="float" office:value="20.583483">
                <text:p>20.5834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9">
                <text:p>1.49</text:p>
              </table:table-cell>
              <table:table-cell office:value-type="float" office:value="20.090963">
                <text:p>20.0909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2">
                <text:p>1.52</text:p>
              </table:table-cell>
              <table:table-cell office:value-type="float" office:value="20.032743">
                <text:p>20.0327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5">
                <text:p>1.55</text:p>
              </table:table-cell>
              <table:table-cell office:value-type="float" office:value="20.032803">
                <text:p>20.0328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8">
                <text:p>1.58</text:p>
              </table:table-cell>
              <table:table-cell office:value-type="float" office:value="20.134459">
                <text:p>20.1344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1">
                <text:p>1.61</text:p>
              </table:table-cell>
              <table:table-cell office:value-type="float" office:value="19.843252">
                <text:p>19.8432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4">
                <text:p>1.64</text:p>
              </table:table-cell>
              <table:table-cell office:value-type="float" office:value="19.543549">
                <text:p>19.543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7">
                <text:p>1.67</text:p>
              </table:table-cell>
              <table:table-cell office:value-type="float" office:value="19.531704">
                <text:p>19.5317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">
                <text:p>1.7</text:p>
              </table:table-cell>
              <table:table-cell office:value-type="float" office:value="19.800298">
                <text:p>19.8002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3">
                <text:p>1.73</text:p>
              </table:table-cell>
              <table:table-cell office:value-type="float" office:value="19.68759">
                <text:p>19.687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6">
                <text:p>1.76</text:p>
              </table:table-cell>
              <table:table-cell office:value-type="float" office:value="19.960366">
                <text:p>19.9603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9">
                <text:p>1.79</text:p>
              </table:table-cell>
              <table:table-cell office:value-type="float" office:value="19.043006">
                <text:p>19.0430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2">
                <text:p>1.82</text:p>
              </table:table-cell>
              <table:table-cell office:value-type="float" office:value="19.650144">
                <text:p>19.6501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5">
                <text:p>1.85</text:p>
              </table:table-cell>
              <table:table-cell office:value-type="float" office:value="19.356378">
                <text:p>19.3563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8">
                <text:p>1.88</text:p>
              </table:table-cell>
              <table:table-cell office:value-type="float" office:value="19.055277">
                <text:p>19.0552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1">
                <text:p>1.91</text:p>
              </table:table-cell>
              <table:table-cell office:value-type="float" office:value="18.013958">
                <text:p>18.0139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4">
                <text:p>1.94</text:p>
              </table:table-cell>
              <table:table-cell office:value-type="float" office:value="20.215632">
                <text:p>20.2156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7">
                <text:p>1.97</text:p>
              </table:table-cell>
              <table:table-cell office:value-type="float" office:value="18.990188">
                <text:p>18.9901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18.803184">
                <text:p>18.8031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3">
                <text:p>2.03</text:p>
              </table:table-cell>
              <table:table-cell office:value-type="float" office:value="19.078106">
                <text:p>19.0781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6">
                <text:p>2.06</text:p>
              </table:table-cell>
              <table:table-cell office:value-type="float" office:value="19.442468">
                <text:p>19.4424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09">
                <text:p>2.09</text:p>
              </table:table-cell>
              <table:table-cell office:value-type="float" office:value="18.81566">
                <text:p>18.815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2">
                <text:p>2.12</text:p>
              </table:table-cell>
              <table:table-cell office:value-type="float" office:value="17.918421">
                <text:p>17.9184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5">
                <text:p>2.15</text:p>
              </table:table-cell>
              <table:table-cell office:value-type="float" office:value="18.834475">
                <text:p>18.8344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8">
                <text:p>2.18</text:p>
              </table:table-cell>
              <table:table-cell office:value-type="float" office:value="18.526838">
                <text:p>18.5268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1">
                <text:p>2.21</text:p>
              </table:table-cell>
              <table:table-cell office:value-type="float" office:value="18.519428">
                <text:p>18.5194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4">
                <text:p>2.24</text:p>
              </table:table-cell>
              <table:table-cell office:value-type="float" office:value="19.622583">
                <text:p>19.6225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27">
                <text:p>2.27</text:p>
              </table:table-cell>
              <table:table-cell office:value-type="float" office:value="18.936532">
                <text:p>18.9365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3">
                <text:p>2.3</text:p>
              </table:table-cell>
              <table:table-cell office:value-type="float" office:value="19.180678">
                <text:p>19.1806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3">
                <text:p>2.33</text:p>
              </table:table-cell>
              <table:table-cell office:value-type="float" office:value="18.578781">
                <text:p>18.5787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6">
                <text:p>2.36</text:p>
              </table:table-cell>
              <table:table-cell office:value-type="float" office:value="18.88761">
                <text:p>18.887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9">
                <text:p>2.39</text:p>
              </table:table-cell>
              <table:table-cell office:value-type="float" office:value="17.19606">
                <text:p>17.196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42">
                <text:p>2.42</text:p>
              </table:table-cell>
              <table:table-cell office:value-type="float" office:value="18.215638">
                <text:p>18.2156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45">
                <text:p>2.45</text:p>
              </table:table-cell>
              <table:table-cell office:value-type="float" office:value="17.702645">
                <text:p>17.7026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48">
                <text:p>2.48</text:p>
              </table:table-cell>
              <table:table-cell office:value-type="float" office:value="16.743575">
                <text:p>16.7435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51">
                <text:p>2.51</text:p>
              </table:table-cell>
              <table:table-cell office:value-type="float" office:value="17.501887">
                <text:p>17.5018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54">
                <text:p>2.54</text:p>
              </table:table-cell>
              <table:table-cell office:value-type="float" office:value="17.963402">
                <text:p>17.9634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7">
                <text:p>2.57</text:p>
              </table:table-cell>
              <table:table-cell office:value-type="float" office:value="17.829833">
                <text:p>17.8298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">
                <text:p>2.6</text:p>
              </table:table-cell>
              <table:table-cell office:value-type="float" office:value="19.267419">
                <text:p>19.2674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3">
                <text:p>2.63</text:p>
              </table:table-cell>
              <table:table-cell office:value-type="float" office:value="18.696734">
                <text:p>18.6967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6">
                <text:p>2.66</text:p>
              </table:table-cell>
              <table:table-cell office:value-type="float" office:value="18.083929">
                <text:p>18.0839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9">
                <text:p>2.69</text:p>
              </table:table-cell>
              <table:table-cell office:value-type="float" office:value="15.848046">
                <text:p>15.8480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72">
                <text:p>2.72</text:p>
              </table:table-cell>
              <table:table-cell office:value-type="float" office:value="19.181665">
                <text:p>19.1816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5">
                <text:p>2.75</text:p>
              </table:table-cell>
              <table:table-cell office:value-type="float" office:value="17.830113">
                <text:p>17.8301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78">
                <text:p>2.78</text:p>
              </table:table-cell>
              <table:table-cell office:value-type="float" office:value="16.857268">
                <text:p>16.8572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1">
                <text:p>2.81</text:p>
              </table:table-cell>
              <table:table-cell office:value-type="float" office:value="17.47326">
                <text:p>17.473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4">
                <text:p>2.84</text:p>
              </table:table-cell>
              <table:table-cell office:value-type="float" office:value="17.940525">
                <text:p>17.9405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7">
                <text:p>2.87</text:p>
              </table:table-cell>
              <table:table-cell office:value-type="float" office:value="17.498862">
                <text:p>17.4988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">
                <text:p>2.9</text:p>
              </table:table-cell>
              <table:table-cell office:value-type="float" office:value="17.345261">
                <text:p>17.3452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93">
                <text:p>2.93</text:p>
              </table:table-cell>
              <table:table-cell office:value-type="float" office:value="17.245689">
                <text:p>17.245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96">
                <text:p>2.96</text:p>
              </table:table-cell>
              <table:table-cell office:value-type="float" office:value="16.470154">
                <text:p>16.4701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99">
                <text:p>2.99</text:p>
              </table:table-cell>
              <table:table-cell office:value-type="float" office:value="17.83945">
                <text:p>17.839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02">
                <text:p>3.02</text:p>
              </table:table-cell>
              <table:table-cell office:value-type="float" office:value="17.376873">
                <text:p>17.3768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05">
                <text:p>3.05</text:p>
              </table:table-cell>
              <table:table-cell office:value-type="float" office:value="15.777253">
                <text:p>15.7772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08">
                <text:p>3.08</text:p>
              </table:table-cell>
              <table:table-cell office:value-type="float" office:value="17.153035">
                <text:p>17.1530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11">
                <text:p>3.11</text:p>
              </table:table-cell>
              <table:table-cell office:value-type="float" office:value="17.159535">
                <text:p>17.1595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14">
                <text:p>3.14</text:p>
              </table:table-cell>
              <table:table-cell office:value-type="float" office:value="16.954576">
                <text:p>16.9545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17">
                <text:p>3.17</text:p>
              </table:table-cell>
              <table:table-cell office:value-type="float" office:value="16.970729">
                <text:p>16.9707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2">
                <text:p>3.2</text:p>
              </table:table-cell>
              <table:table-cell office:value-type="float" office:value="15.696623">
                <text:p>15.6966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23">
                <text:p>3.23</text:p>
              </table:table-cell>
              <table:table-cell office:value-type="float" office:value="15.72007">
                <text:p>15.720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26">
                <text:p>3.26</text:p>
              </table:table-cell>
              <table:table-cell office:value-type="float" office:value="15.303117">
                <text:p>15.3031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29">
                <text:p>3.29</text:p>
              </table:table-cell>
              <table:table-cell office:value-type="float" office:value="16.083913">
                <text:p>16.0839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32">
                <text:p>3.32</text:p>
              </table:table-cell>
              <table:table-cell office:value-type="float" office:value="15.587867">
                <text:p>15.5878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35">
                <text:p>3.35</text:p>
              </table:table-cell>
              <table:table-cell office:value-type="float" office:value="15.300991">
                <text:p>15.3009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38">
                <text:p>3.38</text:p>
              </table:table-cell>
              <table:table-cell office:value-type="float" office:value="16.239933">
                <text:p>16.2399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41">
                <text:p>3.41</text:p>
              </table:table-cell>
              <table:table-cell office:value-type="float" office:value="14.297238">
                <text:p>14.2972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44">
                <text:p>3.44</text:p>
              </table:table-cell>
              <table:table-cell office:value-type="float" office:value="12.909879">
                <text:p>12.9098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47">
                <text:p>3.47</text:p>
              </table:table-cell>
              <table:table-cell office:value-type="float" office:value="14.395444">
                <text:p>14.3954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5">
                <text:p>3.5</text:p>
              </table:table-cell>
              <table:table-cell office:value-type="float" office:value="14.439391">
                <text:p>14.4393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53">
                <text:p>3.53</text:p>
              </table:table-cell>
              <table:table-cell office:value-type="float" office:value="13.378618">
                <text:p>13.3786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56">
                <text:p>3.56</text:p>
              </table:table-cell>
              <table:table-cell office:value-type="float" office:value="12.215124">
                <text:p>12.2151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59">
                <text:p>3.59</text:p>
              </table:table-cell>
              <table:table-cell office:value-type="float" office:value="13.531217">
                <text:p>13.5312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62">
                <text:p>3.62</text:p>
              </table:table-cell>
              <table:table-cell office:value-type="float" office:value="15.073362">
                <text:p>15.0733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65">
                <text:p>3.65</text:p>
              </table:table-cell>
              <table:table-cell office:value-type="float" office:value="12.736198">
                <text:p>12.7361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68">
                <text:p>3.68</text:p>
              </table:table-cell>
              <table:table-cell office:value-type="float" office:value="13.134346">
                <text:p>13.1343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71">
                <text:p>3.71</text:p>
              </table:table-cell>
              <table:table-cell office:value-type="float" office:value="12.822925">
                <text:p>12.8229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74">
                <text:p>3.74</text:p>
              </table:table-cell>
              <table:table-cell office:value-type="float" office:value="11.693923">
                <text:p>11.6939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77">
                <text:p>3.77</text:p>
              </table:table-cell>
              <table:table-cell office:value-type="float" office:value="16.708727">
                <text:p>16.7087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8">
                <text:p>3.8</text:p>
              </table:table-cell>
              <table:table-cell office:value-type="float" office:value="12.512167">
                <text:p>12.5121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83">
                <text:p>3.83</text:p>
              </table:table-cell>
              <table:table-cell office:value-type="float" office:value="12.302958">
                <text:p>12.3029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86">
                <text:p>3.86</text:p>
              </table:table-cell>
              <table:table-cell office:value-type="float" office:value="12.602257">
                <text:p>12.6022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89">
                <text:p>3.89</text:p>
              </table:table-cell>
              <table:table-cell office:value-type="float" office:value="10.930447">
                <text:p>10.9304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92">
                <text:p>3.92</text:p>
              </table:table-cell>
              <table:table-cell office:value-type="float" office:value="14.937885">
                <text:p>14.9378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95">
                <text:p>3.95</text:p>
              </table:table-cell>
              <table:table-cell office:value-type="float" office:value="11.876311">
                <text:p>11.8763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98">
                <text:p>3.98</text:p>
              </table:table-cell>
              <table:table-cell office:value-type="float" office:value="10.836543">
                <text:p>10.8365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01">
                <text:p>4.01</text:p>
              </table:table-cell>
              <table:table-cell office:value-type="float" office:value="11.1632">
                <text:p>11.16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04">
                <text:p>4.04</text:p>
              </table:table-cell>
              <table:table-cell office:value-type="float" office:value="10.438196">
                <text:p>10.4381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07">
                <text:p>4.07</text:p>
              </table:table-cell>
              <table:table-cell office:value-type="float" office:value="10.78655">
                <text:p>10.786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1">
                <text:p>4.1</text:p>
              </table:table-cell>
              <table:table-cell office:value-type="float" office:value="11.581972">
                <text:p>11.5819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13">
                <text:p>4.13</text:p>
              </table:table-cell>
              <table:table-cell office:value-type="float" office:value="10.712497">
                <text:p>10.7124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16">
                <text:p>4.16</text:p>
              </table:table-cell>
              <table:table-cell office:value-type="float" office:value="11.446629">
                <text:p>11.4466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9">
                <text:p>4.19</text:p>
              </table:table-cell>
              <table:table-cell office:value-type="float" office:value="14.083312">
                <text:p>14.0833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22">
                <text:p>4.22</text:p>
              </table:table-cell>
              <table:table-cell office:value-type="float" office:value="10.288457">
                <text:p>10.2884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25">
                <text:p>4.25</text:p>
              </table:table-cell>
              <table:table-cell office:value-type="float" office:value="9.825297">
                <text:p>9.8252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28">
                <text:p>4.28</text:p>
              </table:table-cell>
              <table:table-cell office:value-type="float" office:value="15.278491">
                <text:p>15.2784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31">
                <text:p>4.31</text:p>
              </table:table-cell>
              <table:table-cell office:value-type="float" office:value="9.30037">
                <text:p>9.300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34">
                <text:p>4.34</text:p>
              </table:table-cell>
              <table:table-cell office:value-type="float" office:value="13.883796">
                <text:p>13.8837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37">
                <text:p>4.37</text:p>
              </table:table-cell>
              <table:table-cell office:value-type="float" office:value="11.794507">
                <text:p>11.7945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4">
                <text:p>4.4</text:p>
              </table:table-cell>
              <table:table-cell office:value-type="float" office:value="9.901717">
                <text:p>9.9017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43">
                <text:p>4.43</text:p>
              </table:table-cell>
              <table:table-cell office:value-type="float" office:value="9.441476">
                <text:p>9.4414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6">
                <text:p>4.46</text:p>
              </table:table-cell>
              <table:table-cell office:value-type="float" office:value="9.285034">
                <text:p>9.2850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49">
                <text:p>4.49</text:p>
              </table:table-cell>
              <table:table-cell office:value-type="float" office:value="13.21393">
                <text:p>13.213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52">
                <text:p>4.52</text:p>
              </table:table-cell>
              <table:table-cell office:value-type="float" office:value="9.405894">
                <text:p>9.4058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55">
                <text:p>4.55</text:p>
              </table:table-cell>
              <table:table-cell office:value-type="float" office:value="10.598192">
                <text:p>10.5981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58">
                <text:p>4.58</text:p>
              </table:table-cell>
              <table:table-cell office:value-type="float" office:value="9.323252">
                <text:p>9.3232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61">
                <text:p>4.61</text:p>
              </table:table-cell>
              <table:table-cell office:value-type="float" office:value="11.067765">
                <text:p>11.0677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4">
                <text:p>4.64</text:p>
              </table:table-cell>
              <table:table-cell office:value-type="float" office:value="9.151099">
                <text:p>9.1510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7">
                <text:p>4.67</text:p>
              </table:table-cell>
              <table:table-cell office:value-type="float" office:value="8.55202">
                <text:p>8.552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7">
                <text:p>4.7</text:p>
              </table:table-cell>
              <table:table-cell office:value-type="float" office:value="12.439794">
                <text:p>12.4397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73">
                <text:p>4.73</text:p>
              </table:table-cell>
              <table:table-cell office:value-type="float" office:value="8.188027">
                <text:p>8.1880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76">
                <text:p>4.76</text:p>
              </table:table-cell>
              <table:table-cell office:value-type="float" office:value="8.027142">
                <text:p>8.0271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79">
                <text:p>4.79</text:p>
              </table:table-cell>
              <table:table-cell office:value-type="float" office:value="8.646081">
                <text:p>8.6460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82">
                <text:p>4.82</text:p>
              </table:table-cell>
              <table:table-cell office:value-type="float" office:value="11.213628">
                <text:p>11.2136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85">
                <text:p>4.85</text:p>
              </table:table-cell>
              <table:table-cell office:value-type="float" office:value="7.656543">
                <text:p>7.6565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88">
                <text:p>4.88</text:p>
              </table:table-cell>
              <table:table-cell office:value-type="float" office:value="10.393417">
                <text:p>10.3934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91">
                <text:p>4.91</text:p>
              </table:table-cell>
              <table:table-cell office:value-type="float" office:value="10.138778">
                <text:p>10.1387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4">
                <text:p>4.94</text:p>
              </table:table-cell>
              <table:table-cell office:value-type="float" office:value="7.212292">
                <text:p>7.2122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97">
                <text:p>4.97</text:p>
              </table:table-cell>
              <table:table-cell office:value-type="float" office:value="9.707722">
                <text:p>9.7077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8.16425">
                <text:p>8.164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7.3$Windows_X86_64 LibreOffice_project/30742500f2d3eb4366ac312fa33d3dcabdb3eba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