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_k_attraction1_1.500000_k_attraction2_1.220000" table:style-name="ta1">
        <table:shapes>
          <draw:frame draw:z-index="0" draw:style-name="gr1" draw:text-style-name="P1" svg:width="15.999cm" svg:height="8.999cm" svg:x="8.939cm" svg:y="0.526cm">
            <draw:object draw:notify-on-update-of-ranges="'Result_k_attraction1_1.500000_k_attraction2_1.220000'.A2:'Result_k_attraction1_1.500000_k_attraction2_1.220000'.A51 'Result_k_attraction1_1.500000_k_attraction2_1.220000'.B2:'Result_k_attraction1_1.500000_k_attraction2_1.220000'.B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5.274cm" svg:y="0.631cm">
            <draw:object draw:notify-on-update-of-ranges="'Result_k_attraction1_1.500000_k_attraction2_1.220000'.A2:'Result_k_attraction1_1.500000_k_attraction2_1.220000'.A51 'Result_k_attraction1_1.500000_k_attraction2_1.220000'.C1:'Result_k_attraction1_1.500000_k_attraction2_1.220000'.C1 'Result_k_attraction1_1.500000_k_attraction2_1.220000'.C2:'Result_k_attraction1_1.500000_k_attraction2_1.220000'.C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_repulsion</text:p>
          </table:table-cell>
          <table:table-cell office:value-type="string" calcext:value-type="string">
            <text:p>RMSD_dist</text:p>
          </table:table-cell>
          <table:table-cell office:value-type="string" calcext:value-type="string">
            <text:p>RMSD_angle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300433" calcext:value-type="float">
            <text:p>0,300433</text:p>
          </table:table-cell>
          <table:table-cell office:value-type="float" office:value="64.357386" calcext:value-type="float">
            <text:p>64,357386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0.298741" calcext:value-type="float">
            <text:p>0,298741</text:p>
          </table:table-cell>
          <table:table-cell office:value-type="float" office:value="64.336486" calcext:value-type="float">
            <text:p>64,336486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0.298833" calcext:value-type="float">
            <text:p>0,298833</text:p>
          </table:table-cell>
          <table:table-cell office:value-type="float" office:value="64.336487" calcext:value-type="float">
            <text:p>64,336487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297647" calcext:value-type="float">
            <text:p>0,297647</text:p>
          </table:table-cell>
          <table:table-cell office:value-type="float" office:value="64.357386" calcext:value-type="float">
            <text:p>64,357386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298659" calcext:value-type="float">
            <text:p>0,298659</text:p>
          </table:table-cell>
          <table:table-cell office:value-type="float" office:value="64.357162" calcext:value-type="float">
            <text:p>64,357162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299141" calcext:value-type="float">
            <text:p>0,299141</text:p>
          </table:table-cell>
          <table:table-cell office:value-type="float" office:value="64.348767" calcext:value-type="float">
            <text:p>64,348767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0.300046" calcext:value-type="float">
            <text:p>0,300046</text:p>
          </table:table-cell>
          <table:table-cell office:value-type="float" office:value="64.322172" calcext:value-type="float">
            <text:p>64,322172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0.299242" calcext:value-type="float">
            <text:p>0,299242</text:p>
          </table:table-cell>
          <table:table-cell office:value-type="float" office:value="64.344877" calcext:value-type="float">
            <text:p>64,344877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0.297392" calcext:value-type="float">
            <text:p>0,297392</text:p>
          </table:table-cell>
          <table:table-cell office:value-type="float" office:value="64.356466" calcext:value-type="float">
            <text:p>64,356466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298355" calcext:value-type="float">
            <text:p>0,298355</text:p>
          </table:table-cell>
          <table:table-cell office:value-type="float" office:value="64.357384" calcext:value-type="float">
            <text:p>64,35738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297235" calcext:value-type="float">
            <text:p>0,297235</text:p>
          </table:table-cell>
          <table:table-cell office:value-type="float" office:value="64.357383" calcext:value-type="float">
            <text:p>64,357383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.297151" calcext:value-type="float">
            <text:p>0,297151</text:p>
          </table:table-cell>
          <table:table-cell office:value-type="float" office:value="64.332883" calcext:value-type="float">
            <text:p>64,332883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0.295776" calcext:value-type="float">
            <text:p>0,295776</text:p>
          </table:table-cell>
          <table:table-cell office:value-type="float" office:value="64.346043" calcext:value-type="float">
            <text:p>64,346043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0.299354" calcext:value-type="float">
            <text:p>0,299354</text:p>
          </table:table-cell>
          <table:table-cell office:value-type="float" office:value="64.357377" calcext:value-type="float">
            <text:p>64,357377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0.29432" calcext:value-type="float">
            <text:p>0,29432</text:p>
          </table:table-cell>
          <table:table-cell office:value-type="float" office:value="64.357381" calcext:value-type="float">
            <text:p>64,357381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297572" calcext:value-type="float">
            <text:p>0,297572</text:p>
          </table:table-cell>
          <table:table-cell office:value-type="float" office:value="64.357173" calcext:value-type="float">
            <text:p>64,357173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0.29523" calcext:value-type="float">
            <text:p>0,29523</text:p>
          </table:table-cell>
          <table:table-cell office:value-type="float" office:value="64.34981" calcext:value-type="float">
            <text:p>64,34981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  <table:table-cell office:value-type="float" office:value="0.297063" calcext:value-type="float">
            <text:p>0,297063</text:p>
          </table:table-cell>
          <table:table-cell office:value-type="float" office:value="64.247419" calcext:value-type="float">
            <text:p>64,247419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0.294563" calcext:value-type="float">
            <text:p>0,294563</text:p>
          </table:table-cell>
          <table:table-cell office:value-type="float" office:value="64.357375" calcext:value-type="float">
            <text:p>64,357375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0.2977" calcext:value-type="float">
            <text:p>0,2977</text:p>
          </table:table-cell>
          <table:table-cell office:value-type="float" office:value="64.357373" calcext:value-type="float">
            <text:p>64,357373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296452" calcext:value-type="float">
            <text:p>0,296452</text:p>
          </table:table-cell>
          <table:table-cell office:value-type="float" office:value="64.356918" calcext:value-type="float">
            <text:p>64,356918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0.296948" calcext:value-type="float">
            <text:p>0,296948</text:p>
          </table:table-cell>
          <table:table-cell office:value-type="float" office:value="64.357351" calcext:value-type="float">
            <text:p>64,357351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0.296304" calcext:value-type="float">
            <text:p>0,296304</text:p>
          </table:table-cell>
          <table:table-cell office:value-type="float" office:value="63.869952" calcext:value-type="float">
            <text:p>63,869952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0.285802" calcext:value-type="float">
            <text:p>0,285802</text:p>
          </table:table-cell>
          <table:table-cell office:value-type="float" office:value="51.050239" calcext:value-type="float">
            <text:p>51,050239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  <table:table-cell office:value-type="float" office:value="0.273408" calcext:value-type="float">
            <text:p>0,273408</text:p>
          </table:table-cell>
          <table:table-cell office:value-type="float" office:value="45.231841" calcext:value-type="float">
            <text:p>45,231841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26243" calcext:value-type="float">
            <text:p>0,26243</text:p>
          </table:table-cell>
          <table:table-cell office:value-type="float" office:value="41.195041" calcext:value-type="float">
            <text:p>41,195041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office:value-type="float" office:value="0.242913" calcext:value-type="float">
            <text:p>0,242913</text:p>
          </table:table-cell>
          <table:table-cell office:value-type="float" office:value="37.324593" calcext:value-type="float">
            <text:p>37,324593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0.231674" calcext:value-type="float">
            <text:p>0,231674</text:p>
          </table:table-cell>
          <table:table-cell office:value-type="float" office:value="34.331357" calcext:value-type="float">
            <text:p>34,331357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0.216862" calcext:value-type="float">
            <text:p>0,216862</text:p>
          </table:table-cell>
          <table:table-cell office:value-type="float" office:value="31.579411" calcext:value-type="float">
            <text:p>31,579411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  <table:table-cell office:value-type="float" office:value="0.210026" calcext:value-type="float">
            <text:p>0,210026</text:p>
          </table:table-cell>
          <table:table-cell office:value-type="float" office:value="29.8867" calcext:value-type="float">
            <text:p>29,886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19622" calcext:value-type="float">
            <text:p>0,19622</text:p>
          </table:table-cell>
          <table:table-cell office:value-type="float" office:value="28.085479" calcext:value-type="float">
            <text:p>28,085479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0.184508" calcext:value-type="float">
            <text:p>0,184508</text:p>
          </table:table-cell>
          <table:table-cell office:value-type="float" office:value="26.978888" calcext:value-type="float">
            <text:p>26,978888</text:p>
          </table:table-cell>
        </table:table-row>
        <table:table-row table:style-name="ro1">
          <table:table-cell office:value-type="float" office:value="1.46" calcext:value-type="float">
            <text:p>1,46</text:p>
          </table:table-cell>
          <table:table-cell office:value-type="float" office:value="0.172739" calcext:value-type="float">
            <text:p>0,172739</text:p>
          </table:table-cell>
          <table:table-cell office:value-type="float" office:value="25.379618" calcext:value-type="float">
            <text:p>25,379618</text:p>
          </table:table-cell>
        </table:table-row>
        <table:table-row table:style-name="ro1">
          <table:table-cell office:value-type="float" office:value="1.49" calcext:value-type="float">
            <text:p>1,49</text:p>
          </table:table-cell>
          <table:table-cell office:value-type="float" office:value="0.164258" calcext:value-type="float">
            <text:p>0,164258</text:p>
          </table:table-cell>
          <table:table-cell office:value-type="float" office:value="23.712792" calcext:value-type="float">
            <text:p>23,712792</text:p>
          </table:table-cell>
        </table:table-row>
        <table:table-row table:style-name="ro1">
          <table:table-cell office:value-type="float" office:value="1.52" calcext:value-type="float">
            <text:p>1,52</text:p>
          </table:table-cell>
          <table:table-cell office:value-type="float" office:value="0.152743" calcext:value-type="float">
            <text:p>0,152743</text:p>
          </table:table-cell>
          <table:table-cell office:value-type="float" office:value="23.284903" calcext:value-type="float">
            <text:p>23,284903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14998" calcext:value-type="float">
            <text:p>0,14998</text:p>
          </table:table-cell>
          <table:table-cell office:value-type="float" office:value="22.403869" calcext:value-type="float">
            <text:p>22,403869</text:p>
          </table:table-cell>
        </table:table-row>
        <table:table-row table:style-name="ro1">
          <table:table-cell office:value-type="float" office:value="1.58" calcext:value-type="float">
            <text:p>1,58</text:p>
          </table:table-cell>
          <table:table-cell office:value-type="float" office:value="0.144406" calcext:value-type="float">
            <text:p>0,144406</text:p>
          </table:table-cell>
          <table:table-cell office:value-type="float" office:value="21.863673" calcext:value-type="float">
            <text:p>21,863673</text:p>
          </table:table-cell>
        </table:table-row>
        <table:table-row table:style-name="ro1">
          <table:table-cell office:value-type="float" office:value="1.61" calcext:value-type="float">
            <text:p>1,61</text:p>
          </table:table-cell>
          <table:table-cell office:value-type="float" office:value="0.143712" calcext:value-type="float">
            <text:p>0,143712</text:p>
          </table:table-cell>
          <table:table-cell office:value-type="float" office:value="21.026382" calcext:value-type="float">
            <text:p>21,026382</text:p>
          </table:table-cell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0.134952" calcext:value-type="float">
            <text:p>0,134952</text:p>
          </table:table-cell>
          <table:table-cell office:value-type="float" office:value="21.230214" calcext:value-type="float">
            <text:p>21,230214</text:p>
          </table:table-cell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0.130292" calcext:value-type="float">
            <text:p>0,130292</text:p>
          </table:table-cell>
          <table:table-cell office:value-type="float" office:value="20.579087" calcext:value-type="float">
            <text:p>20,579087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137975" calcext:value-type="float">
            <text:p>0,137975</text:p>
          </table:table-cell>
          <table:table-cell office:value-type="float" office:value="21.079331" calcext:value-type="float">
            <text:p>21,079331</text:p>
          </table:table-cell>
        </table:table-row>
        <table:table-row table:style-name="ro1">
          <table:table-cell office:value-type="float" office:value="1.73" calcext:value-type="float">
            <text:p>1,73</text:p>
          </table:table-cell>
          <table:table-cell office:value-type="float" office:value="0.140157" calcext:value-type="float">
            <text:p>0,140157</text:p>
          </table:table-cell>
          <table:table-cell office:value-type="float" office:value="20.755782" calcext:value-type="float">
            <text:p>20,755782</text:p>
          </table:table-cell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0.141344" calcext:value-type="float">
            <text:p>0,141344</text:p>
          </table:table-cell>
          <table:table-cell office:value-type="float" office:value="21.330091" calcext:value-type="float">
            <text:p>21,330091</text:p>
          </table:table-cell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0.152556" calcext:value-type="float">
            <text:p>0,152556</text:p>
          </table:table-cell>
          <table:table-cell office:value-type="float" office:value="21.393042" calcext:value-type="float">
            <text:p>21,393042</text:p>
          </table:table-cell>
        </table:table-row>
        <table:table-row table:style-name="ro1">
          <table:table-cell office:value-type="float" office:value="1.82" calcext:value-type="float">
            <text:p>1,82</text:p>
          </table:table-cell>
          <table:table-cell office:value-type="float" office:value="0.159217" calcext:value-type="float">
            <text:p>0,159217</text:p>
          </table:table-cell>
          <table:table-cell office:value-type="float" office:value="21.370595" calcext:value-type="float">
            <text:p>21,370595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161196" calcext:value-type="float">
            <text:p>0,161196</text:p>
          </table:table-cell>
          <table:table-cell office:value-type="float" office:value="21.842435" calcext:value-type="float">
            <text:p>21,842435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0.177244" calcext:value-type="float">
            <text:p>0,177244</text:p>
          </table:table-cell>
          <table:table-cell office:value-type="float" office:value="22.083919" calcext:value-type="float">
            <text:p>22,083919</text:p>
          </table:table-cell>
        </table:table-row>
        <table:table-row table:style-name="ro1">
          <table:table-cell office:value-type="float" office:value="1.91" calcext:value-type="float">
            <text:p>1,91</text:p>
          </table:table-cell>
          <table:table-cell office:value-type="float" office:value="0.188342" calcext:value-type="float">
            <text:p>0,188342</text:p>
          </table:table-cell>
          <table:table-cell office:value-type="float" office:value="22.493722" calcext:value-type="float">
            <text:p>22,493722</text:p>
          </table:table-cell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0.197185" calcext:value-type="float">
            <text:p>0,197185</text:p>
          </table:table-cell>
          <table:table-cell office:value-type="float" office:value="22.475313" calcext:value-type="float">
            <text:p>22,475313</text:p>
          </table:table-cell>
        </table:table-row>
        <table:table-row table:style-name="ro1">
          <table:table-cell office:value-type="float" office:value="1.97" calcext:value-type="float">
            <text:p>1,97</text:p>
          </table:table-cell>
          <table:table-cell office:value-type="float" office:value="0.20818" calcext:value-type="float">
            <text:p>0,20818</text:p>
          </table:table-cell>
          <table:table-cell office:value-type="float" office:value="23.723394" calcext:value-type="float">
            <text:p>23,7233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19T13:57:12.237054400</dc:date>
    <meta:editing-duration>PT16M13S</meta:editing-duration>
    <meta:editing-cycles>1</meta:editing-cycles>
    <meta:document-statistic meta:table-count="1" meta:cell-count="153" meta:object-count="2"/>
    <meta:generator>LibreOffice/25.8.6.2$Windows_X86_64 LibreOffice_project/b4b39682cd9868fa725bc664aff94278d315bd04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1.811cm" svg:y="0.315cm" chart:style-name="ch2">
          <text:p><text:span text:style-name="T1">RMSD_Dist en fonction de k_repulsion avec k_attractivité 1 = 1,5, k_attractivité 2 = 1,22</text:span></text:p>
        </chart:title>
        <chart:legend chart:legend-position="end" svg:x="13.165cm" svg:y="4.201cm" style:legend-expansion="high" chart:style-name="ch3"/>
        <chart:plot-area chart:style-name="ch4" svg:x="1.331cm" svg:y="1.778cm" svg:width="11.514cm" svg:height="6.061cm">
          <chart:coordinate-region svg:x="2.251cm" svg:y="1.977cm" svg:width="10.352cm" svg:height="5.215cm"/>
          <chart:axis chart:dimension="x" chart:name="primary-x" chart:style-name="ch5">
            <chart:title svg:x="6.219cm" svg:y="8.019cm" chart:style-name="ch2">
              <text:p><text:span text:style-name="T2">k_repulsion</text:span></text:p>
            </chart:title>
          </chart:axis>
          <chart:axis chart:dimension="y" chart:name="primary-y" chart:style-name="ch6">
            <chart:title svg:x="0.451cm" svg:y="5.668cm" chart:style-name="ch7">
              <text:p><text:span text:style-name="T2">RMSD_dist</text:span></text:p>
            </chart:title>
            <chart:grid chart:style-name="ch8" chart:class="major"/>
          </chart:axis>
          <chart:series chart:style-name="ch9" chart:values-cell-range-address="'Result_k_attraction1_1.500000_k_attraction2_1.220000'.B2:'Result_k_attraction1_1.500000_k_attraction2_1.220000'.B51" loext:label-string="rmsd_dist" chart:class="chart:scatter">
            <chart:domain table:cell-range-address="'Result_k_attraction1_1.500000_k_attraction2_1.220000'.A2:'Result_k_attraction1_1.500000_k_attraction2_1.220000'.A51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msd_di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Result_k_attraction1_1.500000_k_attraction2_1.220000'.A2:'Result_k_attraction1_1.500000_k_attraction2_1.220000'.A51</svg:desc>
                </draw:g>
              </table:table-cell>
              <table:table-cell office:value-type="float" office:value="0.300433">
                <text:p>0.300433</text:p>
                <draw:g>
                  <svg:desc>'Result_k_attraction1_1.500000_k_attraction2_1.220000'.B2:'Result_k_attraction1_1.500000_k_attraction2_1.220000'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">
                <text:p>0.53</text:p>
              </table:table-cell>
              <table:table-cell office:value-type="float" office:value="0.298741">
                <text:p>0.298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">
                <text:p>0.56</text:p>
              </table:table-cell>
              <table:table-cell office:value-type="float" office:value="0.298833">
                <text:p>0.298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">
                <text:p>0.59</text:p>
              </table:table-cell>
              <table:table-cell office:value-type="float" office:value="0.297647">
                <text:p>0.297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">
                <text:p>0.62</text:p>
              </table:table-cell>
              <table:table-cell office:value-type="float" office:value="0.298659">
                <text:p>0.298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299141">
                <text:p>0.299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">
                <text:p>0.68</text:p>
              </table:table-cell>
              <table:table-cell office:value-type="float" office:value="0.300046">
                <text:p>0.300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">
                <text:p>0.71</text:p>
              </table:table-cell>
              <table:table-cell office:value-type="float" office:value="0.299242">
                <text:p>0.299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">
                <text:p>0.74</text:p>
              </table:table-cell>
              <table:table-cell office:value-type="float" office:value="0.297392">
                <text:p>0.297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">
                <text:p>0.77</text:p>
              </table:table-cell>
              <table:table-cell office:value-type="float" office:value="0.298355">
                <text:p>0.298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297235">
                <text:p>0.297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">
                <text:p>0.83</text:p>
              </table:table-cell>
              <table:table-cell office:value-type="float" office:value="0.297151">
                <text:p>0.297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">
                <text:p>0.86</text:p>
              </table:table-cell>
              <table:table-cell office:value-type="float" office:value="0.295776">
                <text:p>0.295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">
                <text:p>0.89</text:p>
              </table:table-cell>
              <table:table-cell office:value-type="float" office:value="0.299354">
                <text:p>0.299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">
                <text:p>0.92</text:p>
              </table:table-cell>
              <table:table-cell office:value-type="float" office:value="0.29432">
                <text:p>0.29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0.297572">
                <text:p>0.297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">
                <text:p>0.98</text:p>
              </table:table-cell>
              <table:table-cell office:value-type="float" office:value="0.29523">
                <text:p>0.29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">
                <text:p>1.01</text:p>
              </table:table-cell>
              <table:table-cell office:value-type="float" office:value="0.297063">
                <text:p>0.297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4">
                <text:p>1.04</text:p>
              </table:table-cell>
              <table:table-cell office:value-type="float" office:value="0.294563">
                <text:p>0.2945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0.2977">
                <text:p>0.29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0.296452">
                <text:p>0.2964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">
                <text:p>1.13</text:p>
              </table:table-cell>
              <table:table-cell office:value-type="float" office:value="0.296948">
                <text:p>0.2969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6">
                <text:p>1.16</text:p>
              </table:table-cell>
              <table:table-cell office:value-type="float" office:value="0.296304">
                <text:p>0.296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9">
                <text:p>1.19</text:p>
              </table:table-cell>
              <table:table-cell office:value-type="float" office:value="0.285802">
                <text:p>0.2858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2">
                <text:p>1.22</text:p>
              </table:table-cell>
              <table:table-cell office:value-type="float" office:value="0.273408">
                <text:p>0.273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26243">
                <text:p>0.262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8">
                <text:p>1.28</text:p>
              </table:table-cell>
              <table:table-cell office:value-type="float" office:value="0.242913">
                <text:p>0.2429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">
                <text:p>1.31</text:p>
              </table:table-cell>
              <table:table-cell office:value-type="float" office:value="0.231674">
                <text:p>0.2316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4">
                <text:p>1.34</text:p>
              </table:table-cell>
              <table:table-cell office:value-type="float" office:value="0.216862">
                <text:p>0.2168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7">
                <text:p>1.37</text:p>
              </table:table-cell>
              <table:table-cell office:value-type="float" office:value="0.210026">
                <text:p>0.2100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">
                <text:p>1.4</text:p>
              </table:table-cell>
              <table:table-cell office:value-type="float" office:value="0.19622">
                <text:p>0.196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3">
                <text:p>1.43</text:p>
              </table:table-cell>
              <table:table-cell office:value-type="float" office:value="0.184508">
                <text:p>0.184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6">
                <text:p>1.46</text:p>
              </table:table-cell>
              <table:table-cell office:value-type="float" office:value="0.172739">
                <text:p>0.172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9">
                <text:p>1.49</text:p>
              </table:table-cell>
              <table:table-cell office:value-type="float" office:value="0.164258">
                <text:p>0.164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2">
                <text:p>1.52</text:p>
              </table:table-cell>
              <table:table-cell office:value-type="float" office:value="0.152743">
                <text:p>0.1527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">
                <text:p>1.55</text:p>
              </table:table-cell>
              <table:table-cell office:value-type="float" office:value="0.14998">
                <text:p>0.14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">
                <text:p>1.58</text:p>
              </table:table-cell>
              <table:table-cell office:value-type="float" office:value="0.144406">
                <text:p>0.144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1">
                <text:p>1.61</text:p>
              </table:table-cell>
              <table:table-cell office:value-type="float" office:value="0.143712">
                <text:p>0.1437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4">
                <text:p>1.64</text:p>
              </table:table-cell>
              <table:table-cell office:value-type="float" office:value="0.134952">
                <text:p>0.1349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">
                <text:p>1.67</text:p>
              </table:table-cell>
              <table:table-cell office:value-type="float" office:value="0.130292">
                <text:p>0.130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">
                <text:p>1.7</text:p>
              </table:table-cell>
              <table:table-cell office:value-type="float" office:value="0.137975">
                <text:p>0.137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3">
                <text:p>1.73</text:p>
              </table:table-cell>
              <table:table-cell office:value-type="float" office:value="0.140157">
                <text:p>0.1401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6">
                <text:p>1.76</text:p>
              </table:table-cell>
              <table:table-cell office:value-type="float" office:value="0.141344">
                <text:p>0.141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9">
                <text:p>1.79</text:p>
              </table:table-cell>
              <table:table-cell office:value-type="float" office:value="0.152556">
                <text:p>0.152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2">
                <text:p>1.82</text:p>
              </table:table-cell>
              <table:table-cell office:value-type="float" office:value="0.159217">
                <text:p>0.1592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5">
                <text:p>1.85</text:p>
              </table:table-cell>
              <table:table-cell office:value-type="float" office:value="0.161196">
                <text:p>0.161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8">
                <text:p>1.88</text:p>
              </table:table-cell>
              <table:table-cell office:value-type="float" office:value="0.177244">
                <text:p>0.1772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1">
                <text:p>1.91</text:p>
              </table:table-cell>
              <table:table-cell office:value-type="float" office:value="0.188342">
                <text:p>0.1883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4">
                <text:p>1.94</text:p>
              </table:table-cell>
              <table:table-cell office:value-type="float" office:value="0.197185">
                <text:p>0.1971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7">
                <text:p>1.97</text:p>
              </table:table-cell>
              <table:table-cell office:value-type="float" office:value="0.20818">
                <text:p>0.20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6.2$Windows_X86_64 LibreOffice_project/b4b39682cd9868fa725bc664aff94278d315bd0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1.779cm" svg:y="0.315cm" chart:style-name="ch2">
          <text:p><text:span text:style-name="T1">RMSD_angle en fonction de k_repulsion  avec k_attractivité 1 = 1,5, k_attractivité 2 = 1,22</text:span></text:p>
        </chart:title>
        <chart:legend chart:legend-position="end" svg:x="12.61cm" svg:y="4.201cm" style:legend-expansion="high" chart:style-name="ch3"/>
        <chart:plot-area chart:style-name="ch4" svg:x="1.331cm" svg:y="1.778cm" svg:width="10.959cm" svg:height="6.061cm">
          <chart:coordinate-region svg:x="1.966cm" svg:y="1.977cm" svg:width="10.084cm" svg:height="5.215cm"/>
          <chart:axis chart:dimension="x" chart:name="primary-x" chart:style-name="ch5">
            <chart:title svg:x="5.914cm" svg:y="8.019cm" chart:style-name="ch2">
              <text:p><text:span text:style-name="T2">K_repulsion</text:span></text:p>
            </chart:title>
          </chart:axis>
          <chart:axis chart:dimension="y" chart:name="primary-y" chart:style-name="ch6">
            <chart:title svg:x="0.451cm" svg:y="5.809cm" chart:style-name="ch7">
              <text:p><text:span text:style-name="T2">RMSD_angle</text:span></text:p>
            </chart:title>
            <chart:grid chart:style-name="ch8" chart:class="major"/>
          </chart:axis>
          <chart:series chart:style-name="ch9" chart:values-cell-range-address="'Result_k_attraction1_1.500000_k_attraction2_1.220000'.C2:'Result_k_attraction1_1.500000_k_attraction2_1.220000'.C51" chart:label-cell-address="'Result_k_attraction1_1.500000_k_attraction2_1.220000'.C1:'Result_k_attraction1_1.500000_k_attraction2_1.220000'.C1" chart:class="chart:scatter">
            <chart:domain table:cell-range-address="'Result_k_attraction1_1.500000_k_attraction2_1.220000'.A2:'Result_k_attraction1_1.500000_k_attraction2_1.220000'.A51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MSD_angle</text:p>
                <draw:g>
                  <svg:desc>'Result_k_attraction1_1.500000_k_attraction2_1.220000'.C1:'Result_k_attraction1_1.500000_k_attraction2_1.2200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Result_k_attraction1_1.500000_k_attraction2_1.220000'.A2:'Result_k_attraction1_1.500000_k_attraction2_1.220000'.A51</svg:desc>
                </draw:g>
              </table:table-cell>
              <table:table-cell office:value-type="float" office:value="64.357386">
                <text:p>64.357386</text:p>
                <draw:g>
                  <svg:desc>'Result_k_attraction1_1.500000_k_attraction2_1.220000'.C2:'Result_k_attraction1_1.500000_k_attraction2_1.220000'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">
                <text:p>0.53</text:p>
              </table:table-cell>
              <table:table-cell office:value-type="float" office:value="64.336486">
                <text:p>64.336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">
                <text:p>0.56</text:p>
              </table:table-cell>
              <table:table-cell office:value-type="float" office:value="64.336487">
                <text:p>64.336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">
                <text:p>0.59</text:p>
              </table:table-cell>
              <table:table-cell office:value-type="float" office:value="64.357386">
                <text:p>64.357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">
                <text:p>0.62</text:p>
              </table:table-cell>
              <table:table-cell office:value-type="float" office:value="64.357162">
                <text:p>64.357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64.348767">
                <text:p>64.348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">
                <text:p>0.68</text:p>
              </table:table-cell>
              <table:table-cell office:value-type="float" office:value="64.322172">
                <text:p>64.322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">
                <text:p>0.71</text:p>
              </table:table-cell>
              <table:table-cell office:value-type="float" office:value="64.344877">
                <text:p>64.344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">
                <text:p>0.74</text:p>
              </table:table-cell>
              <table:table-cell office:value-type="float" office:value="64.356466">
                <text:p>64.356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">
                <text:p>0.77</text:p>
              </table:table-cell>
              <table:table-cell office:value-type="float" office:value="64.357384">
                <text:p>64.357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64.357383">
                <text:p>64.357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">
                <text:p>0.83</text:p>
              </table:table-cell>
              <table:table-cell office:value-type="float" office:value="64.332883">
                <text:p>64.3328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">
                <text:p>0.86</text:p>
              </table:table-cell>
              <table:table-cell office:value-type="float" office:value="64.346043">
                <text:p>64.346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">
                <text:p>0.89</text:p>
              </table:table-cell>
              <table:table-cell office:value-type="float" office:value="64.357377">
                <text:p>64.357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">
                <text:p>0.92</text:p>
              </table:table-cell>
              <table:table-cell office:value-type="float" office:value="64.357381">
                <text:p>64.357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64.357173">
                <text:p>64.357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">
                <text:p>0.98</text:p>
              </table:table-cell>
              <table:table-cell office:value-type="float" office:value="64.34981">
                <text:p>64.34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">
                <text:p>1.01</text:p>
              </table:table-cell>
              <table:table-cell office:value-type="float" office:value="64.247419">
                <text:p>64.2474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4">
                <text:p>1.04</text:p>
              </table:table-cell>
              <table:table-cell office:value-type="float" office:value="64.357375">
                <text:p>64.357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64.357373">
                <text:p>64.357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64.356918">
                <text:p>64.356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">
                <text:p>1.13</text:p>
              </table:table-cell>
              <table:table-cell office:value-type="float" office:value="64.357351">
                <text:p>64.357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6">
                <text:p>1.16</text:p>
              </table:table-cell>
              <table:table-cell office:value-type="float" office:value="63.869952">
                <text:p>63.869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9">
                <text:p>1.19</text:p>
              </table:table-cell>
              <table:table-cell office:value-type="float" office:value="51.050239">
                <text:p>51.0502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2">
                <text:p>1.22</text:p>
              </table:table-cell>
              <table:table-cell office:value-type="float" office:value="45.231841">
                <text:p>45.231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41.195041">
                <text:p>41.1950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8">
                <text:p>1.28</text:p>
              </table:table-cell>
              <table:table-cell office:value-type="float" office:value="37.324593">
                <text:p>37.3245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">
                <text:p>1.31</text:p>
              </table:table-cell>
              <table:table-cell office:value-type="float" office:value="34.331357">
                <text:p>34.331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4">
                <text:p>1.34</text:p>
              </table:table-cell>
              <table:table-cell office:value-type="float" office:value="31.579411">
                <text:p>31.579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7">
                <text:p>1.37</text:p>
              </table:table-cell>
              <table:table-cell office:value-type="float" office:value="29.8867">
                <text:p>29.88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">
                <text:p>1.4</text:p>
              </table:table-cell>
              <table:table-cell office:value-type="float" office:value="28.085479">
                <text:p>28.0854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3">
                <text:p>1.43</text:p>
              </table:table-cell>
              <table:table-cell office:value-type="float" office:value="26.978888">
                <text:p>26.978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6">
                <text:p>1.46</text:p>
              </table:table-cell>
              <table:table-cell office:value-type="float" office:value="25.379618">
                <text:p>25.3796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9">
                <text:p>1.49</text:p>
              </table:table-cell>
              <table:table-cell office:value-type="float" office:value="23.712792">
                <text:p>23.7127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2">
                <text:p>1.52</text:p>
              </table:table-cell>
              <table:table-cell office:value-type="float" office:value="23.284903">
                <text:p>23.284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">
                <text:p>1.55</text:p>
              </table:table-cell>
              <table:table-cell office:value-type="float" office:value="22.403869">
                <text:p>22.4038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">
                <text:p>1.58</text:p>
              </table:table-cell>
              <table:table-cell office:value-type="float" office:value="21.863673">
                <text:p>21.8636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1">
                <text:p>1.61</text:p>
              </table:table-cell>
              <table:table-cell office:value-type="float" office:value="21.026382">
                <text:p>21.0263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4">
                <text:p>1.64</text:p>
              </table:table-cell>
              <table:table-cell office:value-type="float" office:value="21.230214">
                <text:p>21.2302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">
                <text:p>1.67</text:p>
              </table:table-cell>
              <table:table-cell office:value-type="float" office:value="20.579087">
                <text:p>20.5790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">
                <text:p>1.7</text:p>
              </table:table-cell>
              <table:table-cell office:value-type="float" office:value="21.079331">
                <text:p>21.0793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3">
                <text:p>1.73</text:p>
              </table:table-cell>
              <table:table-cell office:value-type="float" office:value="20.755782">
                <text:p>20.7557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6">
                <text:p>1.76</text:p>
              </table:table-cell>
              <table:table-cell office:value-type="float" office:value="21.330091">
                <text:p>21.3300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9">
                <text:p>1.79</text:p>
              </table:table-cell>
              <table:table-cell office:value-type="float" office:value="21.393042">
                <text:p>21.393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2">
                <text:p>1.82</text:p>
              </table:table-cell>
              <table:table-cell office:value-type="float" office:value="21.370595">
                <text:p>21.3705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5">
                <text:p>1.85</text:p>
              </table:table-cell>
              <table:table-cell office:value-type="float" office:value="21.842435">
                <text:p>21.842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8">
                <text:p>1.88</text:p>
              </table:table-cell>
              <table:table-cell office:value-type="float" office:value="22.083919">
                <text:p>22.0839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1">
                <text:p>1.91</text:p>
              </table:table-cell>
              <table:table-cell office:value-type="float" office:value="22.493722">
                <text:p>22.4937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4">
                <text:p>1.94</text:p>
              </table:table-cell>
              <table:table-cell office:value-type="float" office:value="22.475313">
                <text:p>22.4753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7">
                <text:p>1.97</text:p>
              </table:table-cell>
              <table:table-cell office:value-type="float" office:value="23.723394">
                <text:p>23.7233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6.2$Windows_X86_64 LibreOffice_project/b4b39682cd9868fa725bc664aff94278d315bd0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